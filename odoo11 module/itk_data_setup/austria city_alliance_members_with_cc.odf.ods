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5.46mm"/>
    </style:style>
    <style:style style:name="co4" style:family="table-column">
      <style:table-column-properties fo:break-before="auto" style:column-width="1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]" office:value-type="float" office:value="80414" calcext:value-type="float">
            <text:p>804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];[.B1];[.C1])" office:value-type="string" office:string-value="&lt;record model=&quot;res.partner&quot; id=&quot;gemeinde80414&quot;&gt;&lt;field name=&quot;member_of_city_alliance&quot;&gt;True&lt;/field&gt;&lt;/record&gt;" calcext:value-type="string">
            <text:p>&lt;record model="res.partner" id="gemeinde80414"&gt;&lt;field name="member_of_city_alliance"&gt;True&lt;/field&gt;&lt;/record&gt;</text:p>
          </table:table-cell>
          <table:table-cell/>
          <table:table-cell office:value-type="string" calcext:value-type="string">
            <text:p>Rankweil</text:p>
          </table:table-cell>
          <table:table-cell office:value-type="float" office:value="80414" calcext:value-type="float">
            <text:p>804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]" office:value-type="float" office:value="80408" calcext:value-type="float">
            <text:p>804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];[.B2];[.C2])" office:value-type="string" office:string-value="&lt;record model=&quot;res.partner&quot; id=&quot;gemeinde80408&quot;&gt;&lt;field name=&quot;member_of_city_alliance&quot;&gt;True&lt;/field&gt;&lt;/record&gt;" calcext:value-type="string">
            <text:p>&lt;record model="res.partner" id="gemeinde80408"&gt;&lt;field name="member_of_city_alliance"&gt;True&lt;/field&gt;&lt;/record&gt;</text:p>
          </table:table-cell>
          <table:table-cell/>
          <table:table-cell office:value-type="string" calcext:value-type="string">
            <text:p>Götzis</text:p>
          </table:table-cell>
          <table:table-cell office:value-type="float" office:value="80408" calcext:value-type="float">
            <text:p>804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]" office:value-type="float" office:value="80404" calcext:value-type="float">
            <text:p>804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];[.B3];[.C3])" office:value-type="string" office:string-value="&lt;record model=&quot;res.partner&quot; id=&quot;gemeinde80404&quot;&gt;&lt;field name=&quot;member_of_city_alliance&quot;&gt;True&lt;/field&gt;&lt;/record&gt;" calcext:value-type="string">
            <text:p>&lt;record model="res.partner" id="gemeinde80404"&gt;&lt;field name="member_of_city_alliance"&gt;True&lt;/field&gt;&lt;/record&gt;</text:p>
          </table:table-cell>
          <table:table-cell/>
          <table:table-cell office:value-type="string" calcext:value-type="string">
            <text:p>Feldkirch</text:p>
          </table:table-cell>
          <table:table-cell office:value-type="float" office:value="80404" calcext:value-type="float">
            <text:p>804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]" office:value-type="float" office:value="80303" calcext:value-type="float">
            <text:p>803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];[.B4];[.C4])" office:value-type="string" office:string-value="&lt;record model=&quot;res.partner&quot; id=&quot;gemeinde80303&quot;&gt;&lt;field name=&quot;member_of_city_alliance&quot;&gt;True&lt;/field&gt;&lt;/record&gt;" calcext:value-type="string">
            <text:p>&lt;record model="res.partner" id="gemeinde80303"&gt;&lt;field name="member_of_city_alliance"&gt;True&lt;/field&gt;&lt;/record&gt;</text:p>
          </table:table-cell>
          <table:table-cell/>
          <table:table-cell office:value-type="string" calcext:value-type="string">
            <text:p>Lustenau</text:p>
          </table:table-cell>
          <table:table-cell office:value-type="float" office:value="80303" calcext:value-type="float">
            <text:p>803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]" office:value-type="float" office:value="80302" calcext:value-type="float">
            <text:p>803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];[.B5];[.C5])" office:value-type="string" office:string-value="&lt;record model=&quot;res.partner&quot; id=&quot;gemeinde80302&quot;&gt;&lt;field name=&quot;member_of_city_alliance&quot;&gt;True&lt;/field&gt;&lt;/record&gt;" calcext:value-type="string">
            <text:p>&lt;record model="res.partner" id="gemeinde80302"&gt;&lt;field name="member_of_city_alliance"&gt;True&lt;/field&gt;&lt;/record&gt;</text:p>
          </table:table-cell>
          <table:table-cell/>
          <table:table-cell office:value-type="string" calcext:value-type="string">
            <text:p>Hohenems</text:p>
          </table:table-cell>
          <table:table-cell office:value-type="float" office:value="80302" calcext:value-type="float">
            <text:p>803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]" office:value-type="float" office:value="80301" calcext:value-type="float">
            <text:p>803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];[.B6];[.C6])" office:value-type="string" office:string-value="&lt;record model=&quot;res.partner&quot; id=&quot;gemeinde80301&quot;&gt;&lt;field name=&quot;member_of_city_alliance&quot;&gt;True&lt;/field&gt;&lt;/record&gt;" calcext:value-type="string">
            <text:p>&lt;record model="res.partner" id="gemeinde80301"&gt;&lt;field name="member_of_city_alliance"&gt;True&lt;/field&gt;&lt;/record&gt;</text:p>
          </table:table-cell>
          <table:table-cell/>
          <table:table-cell office:value-type="string" calcext:value-type="string">
            <text:p>Dornbirn</text:p>
          </table:table-cell>
          <table:table-cell office:value-type="float" office:value="80301" calcext:value-type="float">
            <text:p>803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]" office:value-type="float" office:value="80224" calcext:value-type="float">
            <text:p>8022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];[.B7];[.C7])" office:value-type="string" office:string-value="&lt;record model=&quot;res.partner&quot; id=&quot;gemeinde80224&quot;&gt;&lt;field name=&quot;member_of_city_alliance&quot;&gt;True&lt;/field&gt;&lt;/record&gt;" calcext:value-type="string">
            <text:p>&lt;record model="res.partner" id="gemeinde80224"&gt;&lt;field name="member_of_city_alliance"&gt;True&lt;/field&gt;&lt;/record&gt;</text:p>
          </table:table-cell>
          <table:table-cell/>
          <table:table-cell office:value-type="string" calcext:value-type="string">
            <text:p>Lauterach</text:p>
          </table:table-cell>
          <table:table-cell office:value-type="float" office:value="80224" calcext:value-type="float">
            <text:p>8022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]" office:value-type="float" office:value="80215" calcext:value-type="float">
            <text:p>8021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];[.B8];[.C8])" office:value-type="string" office:string-value="&lt;record model=&quot;res.partner&quot; id=&quot;gemeinde80215&quot;&gt;&lt;field name=&quot;member_of_city_alliance&quot;&gt;True&lt;/field&gt;&lt;/record&gt;" calcext:value-type="string">
            <text:p>&lt;record model="res.partner" id="gemeinde80215"&gt;&lt;field name="member_of_city_alliance"&gt;True&lt;/field&gt;&lt;/record&gt;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80215" calcext:value-type="float">
            <text:p>8021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]" office:value-type="float" office:value="80207" calcext:value-type="float">
            <text:p>802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];[.B9];[.C9])" office:value-type="string" office:string-value="&lt;record model=&quot;res.partner&quot; id=&quot;gemeinde80207&quot;&gt;&lt;field name=&quot;member_of_city_alliance&quot;&gt;True&lt;/field&gt;&lt;/record&gt;" calcext:value-type="string">
            <text:p>&lt;record model="res.partner" id="gemeinde80207"&gt;&lt;field name="member_of_city_alliance"&gt;True&lt;/field&gt;&lt;/record&gt;</text:p>
          </table:table-cell>
          <table:table-cell/>
          <table:table-cell office:value-type="string" calcext:value-type="string">
            <text:p>Bregenz</text:p>
          </table:table-cell>
          <table:table-cell office:value-type="float" office:value="80207" calcext:value-type="float">
            <text:p>802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]" office:value-type="float" office:value="80103" calcext:value-type="float">
            <text:p>801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];[.B10];[.C10])" office:value-type="string" office:string-value="&lt;record model=&quot;res.partner&quot; id=&quot;gemeinde80103&quot;&gt;&lt;field name=&quot;member_of_city_alliance&quot;&gt;True&lt;/field&gt;&lt;/record&gt;" calcext:value-type="string">
            <text:p>&lt;record model="res.partner" id="gemeinde80103"&gt;&lt;field name="member_of_city_alliance"&gt;True&lt;/field&gt;&lt;/record&gt;</text:p>
          </table:table-cell>
          <table:table-cell/>
          <table:table-cell office:value-type="string" calcext:value-type="string">
            <text:p>Bludenz</text:p>
          </table:table-cell>
          <table:table-cell office:value-type="float" office:value="80103" calcext:value-type="float">
            <text:p>801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]" office:value-type="float" office:value="70926" calcext:value-type="float">
            <text:p>7092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];[.B11];[.C11])" office:value-type="string" office:string-value="&lt;record model=&quot;res.partner&quot; id=&quot;gemeinde70926&quot;&gt;&lt;field name=&quot;member_of_city_alliance&quot;&gt;True&lt;/field&gt;&lt;/record&gt;" calcext:value-type="string">
            <text:p>&lt;record model="res.partner" id="gemeinde70926"&gt;&lt;field name="member_of_city_alliance"&gt;True&lt;/field&gt;&lt;/record&gt;</text:p>
          </table:table-cell>
          <table:table-cell/>
          <table:table-cell office:value-type="string" calcext:value-type="string">
            <text:p>Schwaz</text:p>
          </table:table-cell>
          <table:table-cell office:value-type="float" office:value="70926" calcext:value-type="float">
            <text:p>7092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]" office:value-type="float" office:value="70917" calcext:value-type="float">
            <text:p>709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];[.B12];[.C12])" office:value-type="string" office:string-value="&lt;record model=&quot;res.partner&quot; id=&quot;gemeinde70917&quot;&gt;&lt;field name=&quot;member_of_city_alliance&quot;&gt;True&lt;/field&gt;&lt;/record&gt;" calcext:value-type="string">
            <text:p>&lt;record model="res.partner" id="gemeinde70917"&gt;&lt;field name="member_of_city_alliance"&gt;True&lt;/field&gt;&lt;/record&gt;</text:p>
          </table:table-cell>
          <table:table-cell/>
          <table:table-cell office:value-type="string" calcext:value-type="string">
            <text:p>Jenbach</text:p>
          </table:table-cell>
          <table:table-cell office:value-type="float" office:value="70917" calcext:value-type="float">
            <text:p>709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]" office:value-type="float" office:value="70828" calcext:value-type="float">
            <text:p>7082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];[.B13];[.C13])" office:value-type="string" office:string-value="&lt;record model=&quot;res.partner&quot; id=&quot;gemeinde70828&quot;&gt;&lt;field name=&quot;member_of_city_alliance&quot;&gt;True&lt;/field&gt;&lt;/record&gt;" calcext:value-type="string">
            <text:p>&lt;record model="res.partner" id="gemeinde70828"&gt;&lt;field name="member_of_city_alliance"&gt;True&lt;/field&gt;&lt;/record&gt;</text:p>
          </table:table-cell>
          <table:table-cell/>
          <table:table-cell office:value-type="string" calcext:value-type="string">
            <text:p>Reutte</text:p>
          </table:table-cell>
          <table:table-cell office:value-type="float" office:value="70828" calcext:value-type="float">
            <text:p>7082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]" office:value-type="float" office:value="70716" calcext:value-type="float">
            <text:p>707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];[.B14];[.C14])" office:value-type="string" office:string-value="&lt;record model=&quot;res.partner&quot; id=&quot;gemeinde70716&quot;&gt;&lt;field name=&quot;member_of_city_alliance&quot;&gt;True&lt;/field&gt;&lt;/record&gt;" calcext:value-type="string">
            <text:p>&lt;record model="res.partner" id="gemeinde70716"&gt;&lt;field name="member_of_city_alliance"&gt;True&lt;/field&gt;&lt;/record&gt;</text:p>
          </table:table-cell>
          <table:table-cell/>
          <table:table-cell office:value-type="string" calcext:value-type="string">
            <text:p>Lienz</text:p>
          </table:table-cell>
          <table:table-cell office:value-type="float" office:value="70716" calcext:value-type="float">
            <text:p>707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]" office:value-type="float" office:value="70614" calcext:value-type="float">
            <text:p>706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];[.B15];[.C15])" office:value-type="string" office:string-value="&lt;record model=&quot;res.partner&quot; id=&quot;gemeinde70614&quot;&gt;&lt;field name=&quot;member_of_city_alliance&quot;&gt;True&lt;/field&gt;&lt;/record&gt;" calcext:value-type="string">
            <text:p>&lt;record model="res.partner" id="gemeinde70614"&gt;&lt;field name="member_of_city_alliance"&gt;True&lt;/field&gt;&lt;/record&gt;</text:p>
          </table:table-cell>
          <table:table-cell/>
          <table:table-cell office:value-type="string" calcext:value-type="string">
            <text:p>Landeck</text:p>
          </table:table-cell>
          <table:table-cell office:value-type="float" office:value="70614" calcext:value-type="float">
            <text:p>706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]" office:value-type="float" office:value="70531" calcext:value-type="float">
            <text:p>7053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];[.B16];[.C16])" office:value-type="string" office:string-value="&lt;record model=&quot;res.partner&quot; id=&quot;gemeinde70531&quot;&gt;&lt;field name=&quot;member_of_city_alliance&quot;&gt;True&lt;/field&gt;&lt;/record&gt;" calcext:value-type="string">
            <text:p>&lt;record model="res.partner" id="gemeinde70531"&gt;&lt;field name="member_of_city_alliance"&gt;True&lt;/field&gt;&lt;/record&gt;</text:p>
          </table:table-cell>
          <table:table-cell/>
          <table:table-cell office:value-type="string" calcext:value-type="string">
            <text:p>Wörgl</text:p>
          </table:table-cell>
          <table:table-cell office:value-type="float" office:value="70531" calcext:value-type="float">
            <text:p>7053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]" office:value-type="float" office:value="70513" calcext:value-type="float">
            <text:p>705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];[.B17];[.C17])" office:value-type="string" office:string-value="&lt;record model=&quot;res.partner&quot; id=&quot;gemeinde70513&quot;&gt;&lt;field name=&quot;member_of_city_alliance&quot;&gt;True&lt;/field&gt;&lt;/record&gt;" calcext:value-type="string">
            <text:p>&lt;record model="res.partner" id="gemeinde70513"&gt;&lt;field name="member_of_city_alliance"&gt;True&lt;/field&gt;&lt;/record&gt;</text:p>
          </table:table-cell>
          <table:table-cell/>
          <table:table-cell office:value-type="string" calcext:value-type="string">
            <text:p>Kufstein</text:p>
          </table:table-cell>
          <table:table-cell office:value-type="float" office:value="70513" calcext:value-type="float">
            <text:p>705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]" office:value-type="float" office:value="70411" calcext:value-type="float">
            <text:p>7041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];[.B18];[.C18])" office:value-type="string" office:string-value="&lt;record model=&quot;res.partner&quot; id=&quot;gemeinde70411&quot;&gt;&lt;field name=&quot;member_of_city_alliance&quot;&gt;True&lt;/field&gt;&lt;/record&gt;" calcext:value-type="string">
            <text:p>&lt;record model="res.partner" id="gemeinde70411"&gt;&lt;field name="member_of_city_alliance"&gt;True&lt;/field&gt;&lt;/record&gt;</text:p>
          </table:table-cell>
          <table:table-cell/>
          <table:table-cell office:value-type="string" calcext:value-type="string">
            <text:p>Kitzbühel</text:p>
          </table:table-cell>
          <table:table-cell office:value-type="float" office:value="70411" calcext:value-type="float">
            <text:p>7041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]" office:value-type="float" office:value="70367" calcext:value-type="float">
            <text:p>7036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];[.B19];[.C19])" office:value-type="string" office:string-value="&lt;record model=&quot;res.partner&quot; id=&quot;gemeinde70367&quot;&gt;&lt;field name=&quot;member_of_city_alliance&quot;&gt;True&lt;/field&gt;&lt;/record&gt;" calcext:value-type="string">
            <text:p>&lt;record model="res.partner" id="gemeinde70367"&gt;&lt;field name="member_of_city_alliance"&gt;True&lt;/field&gt;&lt;/record&gt;</text:p>
          </table:table-cell>
          <table:table-cell/>
          <table:table-cell office:value-type="string" calcext:value-type="string">
            <text:p>Wattens</text:p>
          </table:table-cell>
          <table:table-cell office:value-type="float" office:value="70367" calcext:value-type="float">
            <text:p>7036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]" office:value-type="float" office:value="70357" calcext:value-type="float">
            <text:p>7035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];[.B20];[.C20])" office:value-type="string" office:string-value="&lt;record model=&quot;res.partner&quot; id=&quot;gemeinde70357&quot;&gt;&lt;field name=&quot;member_of_city_alliance&quot;&gt;True&lt;/field&gt;&lt;/record&gt;" calcext:value-type="string">
            <text:p>&lt;record model="res.partner" id="gemeinde70357"&gt;&lt;field name="member_of_city_alliance"&gt;True&lt;/field&gt;&lt;/record&gt;</text:p>
          </table:table-cell>
          <table:table-cell/>
          <table:table-cell office:value-type="string" calcext:value-type="string">
            <text:p>Telfs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]" office:value-type="float" office:value="70354" calcext:value-type="float">
            <text:p>7035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];[.B21];[.C21])" office:value-type="string" office:string-value="&lt;record model=&quot;res.partner&quot; id=&quot;gemeinde70354&quot;&gt;&lt;field name=&quot;member_of_city_alliance&quot;&gt;True&lt;/field&gt;&lt;/record&gt;" calcext:value-type="string">
            <text:p>&lt;record model="res.partner" id="gemeinde70354"&gt;&lt;field name="member_of_city_alliance"&gt;True&lt;/field&gt;&lt;/record&gt;</text:p>
          </table:table-cell>
          <table:table-cell/>
          <table:table-cell office:value-type="string" calcext:value-type="string">
            <text:p>Hall in Tirol</text:p>
          </table:table-cell>
          <table:table-cell office:value-type="float" office:value="70354" calcext:value-type="float">
            <text:p>7035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]" office:value-type="float" office:value="70346" calcext:value-type="float">
            <text:p>7034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];[.B22];[.C22])" office:value-type="string" office:string-value="&lt;record model=&quot;res.partner&quot; id=&quot;gemeinde70346&quot;&gt;&lt;field name=&quot;member_of_city_alliance&quot;&gt;True&lt;/field&gt;&lt;/record&gt;" calcext:value-type="string">
            <text:p>&lt;record model="res.partner" id="gemeinde70346"&gt;&lt;field name="member_of_city_alliance"&gt;True&lt;/field&gt;&lt;/record&gt;</text:p>
          </table:table-cell>
          <table:table-cell/>
          <table:table-cell office:value-type="string" calcext:value-type="string">
            <text:p>Rum</text:p>
          </table:table-cell>
          <table:table-cell office:value-type="float" office:value="70346" calcext:value-type="float">
            <text:p>7034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]" office:value-type="float" office:value="70203" calcext:value-type="float">
            <text:p>702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];[.B23];[.C23])" office:value-type="string" office:string-value="&lt;record model=&quot;res.partner&quot; id=&quot;gemeinde70203&quot;&gt;&lt;field name=&quot;member_of_city_alliance&quot;&gt;True&lt;/field&gt;&lt;/record&gt;" calcext:value-type="string">
            <text:p>&lt;record model="res.partner" id="gemeinde70203"&gt;&lt;field name="member_of_city_alliance"&gt;True&lt;/field&gt;&lt;/record&gt;</text:p>
          </table:table-cell>
          <table:table-cell/>
          <table:table-cell office:value-type="string" calcext:value-type="string">
            <text:p>Imst</text:p>
          </table:table-cell>
          <table:table-cell office:value-type="float" office:value="70203" calcext:value-type="float">
            <text:p>702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]" office:value-type="float" office:value="70101" calcext:value-type="float">
            <text:p>7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];[.B24];[.C24])" office:value-type="string" office:string-value="&lt;record model=&quot;res.partner&quot; id=&quot;gemeinde70101&quot;&gt;&lt;field name=&quot;member_of_city_alliance&quot;&gt;True&lt;/field&gt;&lt;/record&gt;" calcext:value-type="string">
            <text:p>&lt;record model="res.partner" id="gemeinde70101"&gt;&lt;field name="member_of_city_alliance"&gt;True&lt;/field&gt;&lt;/record&gt;</text:p>
          </table:table-cell>
          <table:table-cell/>
          <table:table-cell office:value-type="string" calcext:value-type="string">
            <text:p>Innsbruck</text:p>
          </table:table-cell>
          <table:table-cell office:value-type="float" office:value="70101" calcext:value-type="float">
            <text:p>7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]" office:value-type="float" office:value="62383" calcext:value-type="float">
            <text:p>6238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];[.B25];[.C25])" office:value-type="string" office:string-value="&lt;record model=&quot;res.partner&quot; id=&quot;gemeinde62383&quot;&gt;&lt;field name=&quot;member_of_city_alliance&quot;&gt;True&lt;/field&gt;&lt;/record&gt;" calcext:value-type="string">
            <text:p>&lt;record model="res.partner" id="gemeinde62383"&gt;&lt;field name="member_of_city_alliance"&gt;True&lt;/field&gt;&lt;/record&gt;</text:p>
          </table:table-cell>
          <table:table-cell/>
          <table:table-cell office:value-type="string" calcext:value-type="string">
            <text:p>Mureck</text:p>
          </table:table-cell>
          <table:table-cell office:value-type="float" office:value="62383" calcext:value-type="float">
            <text:p>6238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6]" office:value-type="float" office:value="62379" calcext:value-type="float">
            <text:p>6237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6];[.B26];[.C26])" office:value-type="string" office:string-value="&lt;record model=&quot;res.partner&quot; id=&quot;gemeinde62379&quot;&gt;&lt;field name=&quot;member_of_city_alliance&quot;&gt;True&lt;/field&gt;&lt;/record&gt;" calcext:value-type="string">
            <text:p>&lt;record model="res.partner" id="gemeinde62379"&gt;&lt;field name="member_of_city_alliance"&gt;True&lt;/field&gt;&lt;/record&gt;</text:p>
          </table:table-cell>
          <table:table-cell/>
          <table:table-cell office:value-type="string" calcext:value-type="string">
            <text:p>Feldbach</text:p>
          </table:table-cell>
          <table:table-cell office:value-type="float" office:value="62379" calcext:value-type="float">
            <text:p>6237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7]" office:value-type="float" office:value="62378" calcext:value-type="float">
            <text:p>6237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7];[.B27];[.C27])" office:value-type="string" office:string-value="&lt;record model=&quot;res.partner&quot; id=&quot;gemeinde62378&quot;&gt;&lt;field name=&quot;member_of_city_alliance&quot;&gt;True&lt;/field&gt;&lt;/record&gt;" calcext:value-type="string">
            <text:p>&lt;record model="res.partner" id="gemeinde62378"&gt;&lt;field name="member_of_city_alliance"&gt;True&lt;/field&gt;&lt;/record&gt;</text:p>
          </table:table-cell>
          <table:table-cell/>
          <table:table-cell office:value-type="string" calcext:value-type="string">
            <text:p>Fehring</text:p>
          </table:table-cell>
          <table:table-cell office:value-type="float" office:value="62378" calcext:value-type="float">
            <text:p>6237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8]" office:value-type="float" office:value="62376" calcext:value-type="float">
            <text:p>6237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8];[.B28];[.C28])" office:value-type="string" office:string-value="&lt;record model=&quot;res.partner&quot; id=&quot;gemeinde62376&quot;&gt;&lt;field name=&quot;member_of_city_alliance&quot;&gt;True&lt;/field&gt;&lt;/record&gt;" calcext:value-type="string">
            <text:p>&lt;record model="res.partner" id="gemeinde62376"&gt;&lt;field name="member_of_city_alliance"&gt;True&lt;/field&gt;&lt;/record&gt;</text:p>
          </table:table-cell>
          <table:table-cell/>
          <table:table-cell office:value-type="string" calcext:value-type="string">
            <text:p>Bad Radkersburg</text:p>
          </table:table-cell>
          <table:table-cell office:value-type="float" office:value="62376" calcext:value-type="float">
            <text:p>6237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9]" office:value-type="float" office:value="62274" calcext:value-type="float">
            <text:p>6227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9];[.B29];[.C29])" office:value-type="string" office:string-value="&lt;record model=&quot;res.partner&quot; id=&quot;gemeinde62274&quot;&gt;&lt;field name=&quot;member_of_city_alliance&quot;&gt;True&lt;/field&gt;&lt;/record&gt;" calcext:value-type="string">
            <text:p>&lt;record model="res.partner" id="gemeinde62274"&gt;&lt;field name="member_of_city_alliance"&gt;True&lt;/field&gt;&lt;/record&gt;</text:p>
          </table:table-cell>
          <table:table-cell/>
          <table:table-cell office:value-type="string" calcext:value-type="string">
            <text:p>Neudau</text:p>
          </table:table-cell>
          <table:table-cell office:value-type="float" office:value="62274" calcext:value-type="float">
            <text:p>6227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0]" office:value-type="float" office:value="62267" calcext:value-type="float">
            <text:p>6226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0];[.B30];[.C30])" office:value-type="string" office:string-value="&lt;record model=&quot;res.partner&quot; id=&quot;gemeinde62267&quot;&gt;&lt;field name=&quot;member_of_city_alliance&quot;&gt;True&lt;/field&gt;&lt;/record&gt;" calcext:value-type="string">
            <text:p>&lt;record model="res.partner" id="gemeinde62267"&gt;&lt;field name="member_of_city_alliance"&gt;True&lt;/field&gt;&lt;/record&gt;</text:p>
          </table:table-cell>
          <table:table-cell/>
          <table:table-cell office:value-type="string" calcext:value-type="string">
            <text:p>Fürstenfeld</text:p>
          </table:table-cell>
          <table:table-cell office:value-type="float" office:value="62267" calcext:value-type="float">
            <text:p>6226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1]" office:value-type="float" office:value="62219" calcext:value-type="float">
            <text:p>6221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1];[.B31];[.C31])" office:value-type="string" office:string-value="&lt;record model=&quot;res.partner&quot; id=&quot;gemeinde62219&quot;&gt;&lt;field name=&quot;member_of_city_alliance&quot;&gt;True&lt;/field&gt;&lt;/record&gt;" calcext:value-type="string">
            <text:p>&lt;record model="res.partner" id="gemeinde62219"&gt;&lt;field name="member_of_city_alliance"&gt;True&lt;/field&gt;&lt;/record&gt;</text:p>
          </table:table-cell>
          <table:table-cell/>
          <table:table-cell office:value-type="string" calcext:value-type="string">
            <text:p>Hartberg</text:p>
          </table:table-cell>
          <table:table-cell office:value-type="float" office:value="62219" calcext:value-type="float">
            <text:p>6221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2]" office:value-type="float" office:value="62147" calcext:value-type="float">
            <text:p>6214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2];[.B32];[.C32])" office:value-type="string" office:string-value="&lt;record model=&quot;res.partner&quot; id=&quot;gemeinde62147&quot;&gt;&lt;field name=&quot;member_of_city_alliance&quot;&gt;True&lt;/field&gt;&lt;/record&gt;" calcext:value-type="string">
            <text:p>&lt;record model="res.partner" id="gemeinde62147"&gt;&lt;field name="member_of_city_alliance"&gt;True&lt;/field&gt;&lt;/record&gt;</text:p>
          </table:table-cell>
          <table:table-cell/>
          <table:table-cell office:value-type="string" calcext:value-type="string">
            <text:p>Thörl</text:p>
          </table:table-cell>
          <table:table-cell office:value-type="float" office:value="62147" calcext:value-type="float">
            <text:p>6214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3]" office:value-type="float" office:value="62143" calcext:value-type="float">
            <text:p>6214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3];[.B33];[.C33])" office:value-type="string" office:string-value="&lt;record model=&quot;res.partner&quot; id=&quot;gemeinde62143&quot;&gt;&lt;field name=&quot;member_of_city_alliance&quot;&gt;True&lt;/field&gt;&lt;/record&gt;" calcext:value-type="string">
            <text:p>&lt;record model="res.partner" id="gemeinde62143"&gt;&lt;field name="member_of_city_alliance"&gt;True&lt;/field&gt;&lt;/record&gt;</text:p>
          </table:table-cell>
          <table:table-cell/>
          <table:table-cell office:value-type="string" calcext:value-type="string">
            <text:p>Mürzzuschlag</text:p>
          </table:table-cell>
          <table:table-cell office:value-type="float" office:value="62143" calcext:value-type="float">
            <text:p>6214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4]" office:value-type="float" office:value="62142" calcext:value-type="float">
            <text:p>6214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4];[.B34];[.C34])" office:value-type="string" office:string-value="&lt;record model=&quot;res.partner&quot; id=&quot;gemeinde62142&quot;&gt;&lt;field name=&quot;member_of_city_alliance&quot;&gt;True&lt;/field&gt;&lt;/record&gt;" calcext:value-type="string">
            <text:p>&lt;record model="res.partner" id="gemeinde62142"&gt;&lt;field name="member_of_city_alliance"&gt;True&lt;/field&gt;&lt;/record&gt;</text:p>
          </table:table-cell>
          <table:table-cell/>
          <table:table-cell office:value-type="string" calcext:value-type="string">
            <text:p>Mariazell</text:p>
          </table:table-cell>
          <table:table-cell office:value-type="float" office:value="62142" calcext:value-type="float">
            <text:p>6214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5]" office:value-type="float" office:value="62141" calcext:value-type="float">
            <text:p>6214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5];[.B35];[.C35])" office:value-type="string" office:string-value="&lt;record model=&quot;res.partner&quot; id=&quot;gemeinde62141&quot;&gt;&lt;field name=&quot;member_of_city_alliance&quot;&gt;True&lt;/field&gt;&lt;/record&gt;" calcext:value-type="string">
            <text:p>&lt;record model="res.partner" id="gemeinde62141"&gt;&lt;field name="member_of_city_alliance"&gt;True&lt;/field&gt;&lt;/record&gt;</text:p>
          </table:table-cell>
          <table:table-cell/>
          <table:table-cell office:value-type="string" calcext:value-type="string">
            <text:p>Kindberg</text:p>
          </table:table-cell>
          <table:table-cell office:value-type="float" office:value="62141" calcext:value-type="float">
            <text:p>6214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6]" office:value-type="float" office:value="62140" calcext:value-type="float">
            <text:p>6214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6];[.B36];[.C36])" office:value-type="string" office:string-value="&lt;record model=&quot;res.partner&quot; id=&quot;gemeinde62140&quot;&gt;&lt;field name=&quot;member_of_city_alliance&quot;&gt;True&lt;/field&gt;&lt;/record&gt;" calcext:value-type="string">
            <text:p>&lt;record model="res.partner" id="gemeinde62140"&gt;&lt;field name="member_of_city_alliance"&gt;True&lt;/field&gt;&lt;/record&gt;</text:p>
          </table:table-cell>
          <table:table-cell/>
          <table:table-cell office:value-type="string" calcext:value-type="string">
            <text:p>Kapfenberg</text:p>
          </table:table-cell>
          <table:table-cell office:value-type="float" office:value="62140" calcext:value-type="float">
            <text:p>6214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7]" office:value-type="float" office:value="62116" calcext:value-type="float">
            <text:p>621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7];[.B37];[.C37])" office:value-type="string" office:string-value="&lt;record model=&quot;res.partner&quot; id=&quot;gemeinde62116&quot;&gt;&lt;field name=&quot;member_of_city_alliance&quot;&gt;True&lt;/field&gt;&lt;/record&gt;" calcext:value-type="string">
            <text:p>&lt;record model="res.partner" id="gemeinde62116"&gt;&lt;field name="member_of_city_alliance"&gt;True&lt;/field&gt;&lt;/record&gt;</text:p>
          </table:table-cell>
          <table:table-cell/>
          <table:table-cell office:value-type="string" calcext:value-type="string">
            <text:p>Langenwang</text:p>
          </table:table-cell>
          <table:table-cell office:value-type="float" office:value="62116" calcext:value-type="float">
            <text:p>621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8]" office:value-type="float" office:value="62047" calcext:value-type="float">
            <text:p>6204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8];[.B38];[.C38])" office:value-type="string" office:string-value="&lt;record model=&quot;res.partner&quot; id=&quot;gemeinde62047&quot;&gt;&lt;field name=&quot;member_of_city_alliance&quot;&gt;True&lt;/field&gt;&lt;/record&gt;" calcext:value-type="string">
            <text:p>&lt;record model="res.partner" id="gemeinde62047"&gt;&lt;field name="member_of_city_alliance"&gt;True&lt;/field&gt;&lt;/record&gt;</text:p>
          </table:table-cell>
          <table:table-cell/>
          <table:table-cell office:value-type="string" calcext:value-type="string">
            <text:p>Spielberg</text:p>
          </table:table-cell>
          <table:table-cell office:value-type="float" office:value="62047" calcext:value-type="float">
            <text:p>6204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39]" office:value-type="float" office:value="62043" calcext:value-type="float">
            <text:p>6204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39];[.B39];[.C39])" office:value-type="string" office:string-value="&lt;record model=&quot;res.partner&quot; id=&quot;gemeinde62043&quot;&gt;&lt;field name=&quot;member_of_city_alliance&quot;&gt;True&lt;/field&gt;&lt;/record&gt;" calcext:value-type="string">
            <text:p>&lt;record model="res.partner" id="gemeinde62043"&gt;&lt;field name="member_of_city_alliance"&gt;True&lt;/field&gt;&lt;/record&gt;</text:p>
          </table:table-cell>
          <table:table-cell/>
          <table:table-cell office:value-type="string" calcext:value-type="string">
            <text:p>Pöls-Oberkurzheim</text:p>
          </table:table-cell>
          <table:table-cell office:value-type="float" office:value="62043" calcext:value-type="float">
            <text:p>6204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0]" office:value-type="float" office:value="62041" calcext:value-type="float">
            <text:p>6204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0];[.B40];[.C40])" office:value-type="string" office:string-value="&lt;record model=&quot;res.partner&quot; id=&quot;gemeinde62041&quot;&gt;&lt;field name=&quot;member_of_city_alliance&quot;&gt;True&lt;/field&gt;&lt;/record&gt;" calcext:value-type="string">
            <text:p>&lt;record model="res.partner" id="gemeinde62041"&gt;&lt;field name="member_of_city_alliance"&gt;True&lt;/field&gt;&lt;/record&gt;</text:p>
          </table:table-cell>
          <table:table-cell/>
          <table:table-cell office:value-type="string" calcext:value-type="string">
            <text:p>Knittelfeld</text:p>
          </table:table-cell>
          <table:table-cell office:value-type="float" office:value="62041" calcext:value-type="float">
            <text:p>6204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1]" office:value-type="float" office:value="62040" calcext:value-type="float">
            <text:p>6204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1];[.B41];[.C41])" office:value-type="string" office:string-value="&lt;record model=&quot;res.partner&quot; id=&quot;gemeinde62040&quot;&gt;&lt;field name=&quot;member_of_city_alliance&quot;&gt;True&lt;/field&gt;&lt;/record&gt;" calcext:value-type="string">
            <text:p>&lt;record model="res.partner" id="gemeinde62040"&gt;&lt;field name="member_of_city_alliance"&gt;True&lt;/field&gt;&lt;/record&gt;</text:p>
          </table:table-cell>
          <table:table-cell/>
          <table:table-cell office:value-type="string" calcext:value-type="string">
            <text:p>Judenburg</text:p>
          </table:table-cell>
          <table:table-cell office:value-type="float" office:value="62040" calcext:value-type="float">
            <text:p>6204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2]" office:value-type="float" office:value="62038" calcext:value-type="float">
            <text:p>6203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2];[.B42];[.C42])" office:value-type="string" office:string-value="&lt;record model=&quot;res.partner&quot; id=&quot;gemeinde62038&quot;&gt;&lt;field name=&quot;member_of_city_alliance&quot;&gt;True&lt;/field&gt;&lt;/record&gt;" calcext:value-type="string">
            <text:p>&lt;record model="res.partner" id="gemeinde62038"&gt;&lt;field name="member_of_city_alliance"&gt;True&lt;/field&gt;&lt;/record&gt;</text:p>
          </table:table-cell>
          <table:table-cell/>
          <table:table-cell office:value-type="string" calcext:value-type="string">
            <text:p>Zeltweg</text:p>
          </table:table-cell>
          <table:table-cell office:value-type="float" office:value="62038" calcext:value-type="float">
            <text:p>6203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3]" office:value-type="float" office:value="62007" calcext:value-type="float">
            <text:p>620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3];[.B43];[.C43])" office:value-type="string" office:string-value="&lt;record model=&quot;res.partner&quot; id=&quot;gemeinde62007&quot;&gt;&lt;field name=&quot;member_of_city_alliance&quot;&gt;True&lt;/field&gt;&lt;/record&gt;" calcext:value-type="string">
            <text:p>&lt;record model="res.partner" id="gemeinde62007"&gt;&lt;field name="member_of_city_alliance"&gt;True&lt;/field&gt;&lt;/record&gt;</text:p>
          </table:table-cell>
          <table:table-cell/>
          <table:table-cell office:value-type="string" calcext:value-type="string">
            <text:p>Fohnsdorf</text:p>
          </table:table-cell>
          <table:table-cell office:value-type="float" office:value="62007" calcext:value-type="float">
            <text:p>620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4]" office:value-type="float" office:value="61766" calcext:value-type="float">
            <text:p>6176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4];[.B44];[.C44])" office:value-type="string" office:string-value="&lt;record model=&quot;res.partner&quot; id=&quot;gemeinde61766&quot;&gt;&lt;field name=&quot;member_of_city_alliance&quot;&gt;True&lt;/field&gt;&lt;/record&gt;" calcext:value-type="string">
            <text:p>&lt;record model="res.partner" id="gemeinde61766"&gt;&lt;field name="member_of_city_alliance"&gt;True&lt;/field&gt;&lt;/record&gt;</text:p>
          </table:table-cell>
          <table:table-cell/>
          <table:table-cell office:value-type="string" calcext:value-type="string">
            <text:p>Weiz</text:p>
          </table:table-cell>
          <table:table-cell office:value-type="float" office:value="61766" calcext:value-type="float">
            <text:p>6176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5]" office:value-type="float" office:value="61760" calcext:value-type="float">
            <text:p>6176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5];[.B45];[.C45])" office:value-type="string" office:string-value="&lt;record model=&quot;res.partner&quot; id=&quot;gemeinde61760&quot;&gt;&lt;field name=&quot;member_of_city_alliance&quot;&gt;True&lt;/field&gt;&lt;/record&gt;" calcext:value-type="string">
            <text:p>&lt;record model="res.partner" id="gemeinde61760"&gt;&lt;field name="member_of_city_alliance"&gt;True&lt;/field&gt;&lt;/record&gt;</text:p>
          </table:table-cell>
          <table:table-cell/>
          <table:table-cell office:value-type="string" calcext:value-type="string">
            <text:p>Gleisdorf</text:p>
          </table:table-cell>
          <table:table-cell office:value-type="float" office:value="61760" calcext:value-type="float">
            <text:p>6176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6]" office:value-type="float" office:value="61632" calcext:value-type="float">
            <text:p>6163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6];[.B46];[.C46])" office:value-type="string" office:string-value="&lt;record model=&quot;res.partner&quot; id=&quot;gemeinde61632&quot;&gt;&lt;field name=&quot;member_of_city_alliance&quot;&gt;True&lt;/field&gt;&lt;/record&gt;" calcext:value-type="string">
            <text:p>&lt;record model="res.partner" id="gemeinde61632"&gt;&lt;field name="member_of_city_alliance"&gt;True&lt;/field&gt;&lt;/record&gt;</text:p>
          </table:table-cell>
          <table:table-cell/>
          <table:table-cell office:value-type="string" calcext:value-type="string">
            <text:p>Maria Lankowitz</text:p>
          </table:table-cell>
          <table:table-cell office:value-type="float" office:value="61632" calcext:value-type="float">
            <text:p>6163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7]" office:value-type="float" office:value="61631" calcext:value-type="float">
            <text:p>6163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7];[.B47];[.C47])" office:value-type="string" office:string-value="&lt;record model=&quot;res.partner&quot; id=&quot;gemeinde61631&quot;&gt;&lt;field name=&quot;member_of_city_alliance&quot;&gt;True&lt;/field&gt;&lt;/record&gt;" calcext:value-type="string">
            <text:p>&lt;record model="res.partner" id="gemeinde61631"&gt;&lt;field name="member_of_city_alliance"&gt;True&lt;/field&gt;&lt;/record&gt;</text:p>
          </table:table-cell>
          <table:table-cell/>
          <table:table-cell office:value-type="string" calcext:value-type="string">
            <text:p>Köflach</text:p>
          </table:table-cell>
          <table:table-cell office:value-type="float" office:value="61631" calcext:value-type="float">
            <text:p>6163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8]" office:value-type="float" office:value="61626" calcext:value-type="float">
            <text:p>6162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8];[.B48];[.C48])" office:value-type="string" office:string-value="&lt;record model=&quot;res.partner&quot; id=&quot;gemeinde61626&quot;&gt;&lt;field name=&quot;member_of_city_alliance&quot;&gt;True&lt;/field&gt;&lt;/record&gt;" calcext:value-type="string">
            <text:p>&lt;record model="res.partner" id="gemeinde61626"&gt;&lt;field name="member_of_city_alliance"&gt;True&lt;/field&gt;&lt;/record&gt;</text:p>
          </table:table-cell>
          <table:table-cell/>
          <table:table-cell office:value-type="string" calcext:value-type="string">
            <text:p>Bärnbach</text:p>
          </table:table-cell>
          <table:table-cell office:value-type="float" office:value="61626" calcext:value-type="float">
            <text:p>6162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49]" office:value-type="float" office:value="61625" calcext:value-type="float">
            <text:p>6162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49];[.B49];[.C49])" office:value-type="string" office:string-value="&lt;record model=&quot;res.partner&quot; id=&quot;gemeinde61625&quot;&gt;&lt;field name=&quot;member_of_city_alliance&quot;&gt;True&lt;/field&gt;&lt;/record&gt;" calcext:value-type="string">
            <text:p>&lt;record model="res.partner" id="gemeinde61625"&gt;&lt;field name="member_of_city_alliance"&gt;True&lt;/field&gt;&lt;/record&gt;</text:p>
          </table:table-cell>
          <table:table-cell/>
          <table:table-cell office:value-type="string" calcext:value-type="string">
            <text:p>Voitsberg</text:p>
          </table:table-cell>
          <table:table-cell office:value-type="float" office:value="61625" calcext:value-type="float">
            <text:p>6162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0]" office:value-type="float" office:value="61440" calcext:value-type="float">
            <text:p>6144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0];[.B50];[.C50])" office:value-type="string" office:string-value="&lt;record model=&quot;res.partner&quot; id=&quot;gemeinde61440&quot;&gt;&lt;field name=&quot;member_of_city_alliance&quot;&gt;True&lt;/field&gt;&lt;/record&gt;" calcext:value-type="string">
            <text:p>&lt;record model="res.partner" id="gemeinde61440"&gt;&lt;field name="member_of_city_alliance"&gt;True&lt;/field&gt;&lt;/record&gt;</text:p>
          </table:table-cell>
          <table:table-cell/>
          <table:table-cell office:value-type="string" calcext:value-type="string">
            <text:p>Oberwölz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1]" office:value-type="float" office:value="61438" calcext:value-type="float">
            <text:p>6143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1];[.B51];[.C51])" office:value-type="string" office:string-value="&lt;record model=&quot;res.partner&quot; id=&quot;gemeinde61438&quot;&gt;&lt;field name=&quot;member_of_city_alliance&quot;&gt;True&lt;/field&gt;&lt;/record&gt;" calcext:value-type="string">
            <text:p>&lt;record model="res.partner" id="gemeinde61438"&gt;&lt;field name="member_of_city_alliance"&gt;True&lt;/field&gt;&lt;/record&gt;</text:p>
          </table:table-cell>
          <table:table-cell/>
          <table:table-cell office:value-type="string" calcext:value-type="string">
            <text:p>Murau</text:p>
          </table:table-cell>
          <table:table-cell office:value-type="float" office:value="61438" calcext:value-type="float">
            <text:p>6143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2]" office:value-type="float" office:value="61265" calcext:value-type="float">
            <text:p>6126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2];[.B52];[.C52])" office:value-type="string" office:string-value="&lt;record model=&quot;res.partner&quot; id=&quot;gemeinde61265&quot;&gt;&lt;field name=&quot;member_of_city_alliance&quot;&gt;True&lt;/field&gt;&lt;/record&gt;" calcext:value-type="string">
            <text:p>&lt;record model="res.partner" id="gemeinde61265"&gt;&lt;field name="member_of_city_alliance"&gt;True&lt;/field&gt;&lt;/record&gt;</text:p>
          </table:table-cell>
          <table:table-cell/>
          <table:table-cell office:value-type="string" calcext:value-type="string">
            <text:p>Schladming</text:p>
          </table:table-cell>
          <table:table-cell office:value-type="float" office:value="61265" calcext:value-type="float">
            <text:p>6126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3]" office:value-type="float" office:value="61263" calcext:value-type="float">
            <text:p>6126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3];[.B53];[.C53])" office:value-type="string" office:string-value="&lt;record model=&quot;res.partner&quot; id=&quot;gemeinde61263&quot;&gt;&lt;field name=&quot;member_of_city_alliance&quot;&gt;True&lt;/field&gt;&lt;/record&gt;" calcext:value-type="string">
            <text:p>&lt;record model="res.partner" id="gemeinde61263"&gt;&lt;field name="member_of_city_alliance"&gt;True&lt;/field&gt;&lt;/record&gt;</text:p>
          </table:table-cell>
          <table:table-cell/>
          <table:table-cell office:value-type="string" calcext:value-type="string">
            <text:p>Rottenmann</text:p>
          </table:table-cell>
          <table:table-cell office:value-type="float" office:value="61263" calcext:value-type="float">
            <text:p>6126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4]" office:value-type="float" office:value="61259" calcext:value-type="float">
            <text:p>6125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4];[.B54];[.C54])" office:value-type="string" office:string-value="&lt;record model=&quot;res.partner&quot; id=&quot;gemeinde61259&quot;&gt;&lt;field name=&quot;member_of_city_alliance&quot;&gt;True&lt;/field&gt;&lt;/record&gt;" calcext:value-type="string">
            <text:p>&lt;record model="res.partner" id="gemeinde61259"&gt;&lt;field name="member_of_city_alliance"&gt;True&lt;/field&gt;&lt;/record&gt;</text:p>
          </table:table-cell>
          <table:table-cell/>
          <table:table-cell office:value-type="string" calcext:value-type="string">
            <text:p>Liezen</text:p>
          </table:table-cell>
          <table:table-cell office:value-type="float" office:value="61259" calcext:value-type="float">
            <text:p>6125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5]" office:value-type="float" office:value="61247" calcext:value-type="float">
            <text:p>6124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5];[.B55];[.C55])" office:value-type="string" office:string-value="&lt;record model=&quot;res.partner&quot; id=&quot;gemeinde61247&quot;&gt;&lt;field name=&quot;member_of_city_alliance&quot;&gt;True&lt;/field&gt;&lt;/record&gt;" calcext:value-type="string">
            <text:p>&lt;record model="res.partner" id="gemeinde61247"&gt;&lt;field name="member_of_city_alliance"&gt;True&lt;/field&gt;&lt;/record&gt;</text:p>
          </table:table-cell>
          <table:table-cell/>
          <table:table-cell office:value-type="string" calcext:value-type="string">
            <text:p>Trieben</text:p>
          </table:table-cell>
          <table:table-cell office:value-type="float" office:value="61247" calcext:value-type="float">
            <text:p>6124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6]" office:value-type="float" office:value="61243" calcext:value-type="float">
            <text:p>6124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6];[.B56];[.C56])" office:value-type="string" office:string-value="&lt;record model=&quot;res.partner&quot; id=&quot;gemeinde61243&quot;&gt;&lt;field name=&quot;member_of_city_alliance&quot;&gt;True&lt;/field&gt;&lt;/record&gt;" calcext:value-type="string">
            <text:p>&lt;record model="res.partner" id="gemeinde61243"&gt;&lt;field name="member_of_city_alliance"&gt;True&lt;/field&gt;&lt;/record&gt;</text:p>
          </table:table-cell>
          <table:table-cell/>
          <table:table-cell office:value-type="string" calcext:value-type="string">
            <text:p>Selzthal</text:p>
          </table:table-cell>
          <table:table-cell office:value-type="float" office:value="61243" calcext:value-type="float">
            <text:p>6124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7]" office:value-type="float" office:value="61213" calcext:value-type="float">
            <text:p>612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7];[.B57];[.C57])" office:value-type="string" office:string-value="&lt;record model=&quot;res.partner&quot; id=&quot;gemeinde61213&quot;&gt;&lt;field name=&quot;member_of_city_alliance&quot;&gt;True&lt;/field&gt;&lt;/record&gt;" calcext:value-type="string">
            <text:p>&lt;record model="res.partner" id="gemeinde61213"&gt;&lt;field name="member_of_city_alliance"&gt;True&lt;/field&gt;&lt;/record&gt;</text:p>
          </table:table-cell>
          <table:table-cell/>
          <table:table-cell office:value-type="string" calcext:value-type="string">
            <text:p>Gröbming</text:p>
          </table:table-cell>
          <table:table-cell office:value-type="float" office:value="61213" calcext:value-type="float">
            <text:p>612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8]" office:value-type="float" office:value="61207" calcext:value-type="float">
            <text:p>612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8];[.B58];[.C58])" office:value-type="string" office:string-value="&lt;record model=&quot;res.partner&quot; id=&quot;gemeinde61207&quot;&gt;&lt;field name=&quot;member_of_city_alliance&quot;&gt;True&lt;/field&gt;&lt;/record&gt;" calcext:value-type="string">
            <text:p>&lt;record model="res.partner" id="gemeinde61207"&gt;&lt;field name="member_of_city_alliance"&gt;True&lt;/field&gt;&lt;/record&gt;</text:p>
          </table:table-cell>
          <table:table-cell/>
          <table:table-cell office:value-type="string" calcext:value-type="string">
            <text:p>Bad Aussee</text:p>
          </table:table-cell>
          <table:table-cell office:value-type="float" office:value="61207" calcext:value-type="float">
            <text:p>612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59]" office:value-type="float" office:value="61120" calcext:value-type="float">
            <text:p>6112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59];[.B59];[.C59])" office:value-type="string" office:string-value="&lt;record model=&quot;res.partner&quot; id=&quot;gemeinde61120&quot;&gt;&lt;field name=&quot;member_of_city_alliance&quot;&gt;True&lt;/field&gt;&lt;/record&gt;" calcext:value-type="string">
            <text:p>&lt;record model="res.partner" id="gemeinde61120"&gt;&lt;field name="member_of_city_alliance"&gt;True&lt;/field&gt;&lt;/record&gt;</text:p>
          </table:table-cell>
          <table:table-cell/>
          <table:table-cell office:value-type="string" calcext:value-type="string">
            <text:p>Trofaiach</text:p>
          </table:table-cell>
          <table:table-cell office:value-type="float" office:value="61120" calcext:value-type="float">
            <text:p>6112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0]" office:value-type="float" office:value="61110" calcext:value-type="float">
            <text:p>6111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0];[.B60];[.C60])" office:value-type="string" office:string-value="&lt;record model=&quot;res.partner&quot; id=&quot;gemeinde61110&quot;&gt;&lt;field name=&quot;member_of_city_alliance&quot;&gt;True&lt;/field&gt;&lt;/record&gt;" calcext:value-type="string">
            <text:p>&lt;record model="res.partner" id="gemeinde61110"&gt;&lt;field name="member_of_city_alliance"&gt;True&lt;/field&gt;&lt;/record&gt;</text:p>
          </table:table-cell>
          <table:table-cell/>
          <table:table-cell office:value-type="string" calcext:value-type="string">
            <text:p>Niklasdorf</text:p>
          </table:table-cell>
          <table:table-cell office:value-type="float" office:value="61110" calcext:value-type="float">
            <text:p>6111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1]" office:value-type="float" office:value="61108" calcext:value-type="float">
            <text:p>611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1];[.B61];[.C61])" office:value-type="string" office:string-value="&lt;record model=&quot;res.partner&quot; id=&quot;gemeinde61108&quot;&gt;&lt;field name=&quot;member_of_city_alliance&quot;&gt;True&lt;/field&gt;&lt;/record&gt;" calcext:value-type="string">
            <text:p>&lt;record model="res.partner" id="gemeinde61108"&gt;&lt;field name="member_of_city_alliance"&gt;True&lt;/field&gt;&lt;/record&gt;</text:p>
          </table:table-cell>
          <table:table-cell/>
          <table:table-cell office:value-type="string" calcext:value-type="string">
            <text:p>Leoben</text:p>
          </table:table-cell>
          <table:table-cell office:value-type="float" office:value="61108" calcext:value-type="float">
            <text:p>611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2]" office:value-type="float" office:value="61101" calcext:value-type="float">
            <text:p>61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2];[.B62];[.C62])" office:value-type="string" office:string-value="&lt;record model=&quot;res.partner&quot; id=&quot;gemeinde61101&quot;&gt;&lt;field name=&quot;member_of_city_alliance&quot;&gt;True&lt;/field&gt;&lt;/record&gt;" calcext:value-type="string">
            <text:p>&lt;record model="res.partner" id="gemeinde61101"&gt;&lt;field name="member_of_city_alliance"&gt;True&lt;/field&gt;&lt;/record&gt;</text:p>
          </table:table-cell>
          <table:table-cell/>
          <table:table-cell office:value-type="string" calcext:value-type="string">
            <text:p>Eisenerz</text:p>
          </table:table-cell>
          <table:table-cell office:value-type="float" office:value="61101" calcext:value-type="float">
            <text:p>61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3]" office:value-type="float" office:value="61053" calcext:value-type="float">
            <text:p>6105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3];[.B63];[.C63])" office:value-type="string" office:string-value="&lt;record model=&quot;res.partner&quot; id=&quot;gemeinde61053&quot;&gt;&lt;field name=&quot;member_of_city_alliance&quot;&gt;True&lt;/field&gt;&lt;/record&gt;" calcext:value-type="string">
            <text:p>&lt;record model="res.partner" id="gemeinde61053"&gt;&lt;field name="member_of_city_alliance"&gt;True&lt;/field&gt;&lt;/record&gt;</text:p>
          </table:table-cell>
          <table:table-cell/>
          <table:table-cell office:value-type="string" calcext:value-type="string">
            <text:p>Leibnitz</text:p>
          </table:table-cell>
          <table:table-cell office:value-type="float" office:value="61053" calcext:value-type="float">
            <text:p>6105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4]" office:value-type="float" office:value="61045" calcext:value-type="float">
            <text:p>6104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4];[.B64];[.C64])" office:value-type="string" office:string-value="&lt;record model=&quot;res.partner&quot; id=&quot;gemeinde61045&quot;&gt;&lt;field name=&quot;member_of_city_alliance&quot;&gt;True&lt;/field&gt;&lt;/record&gt;" calcext:value-type="string">
            <text:p>&lt;record model="res.partner" id="gemeinde61045"&gt;&lt;field name="member_of_city_alliance"&gt;True&lt;/field&gt;&lt;/record&gt;</text:p>
          </table:table-cell>
          <table:table-cell/>
          <table:table-cell office:value-type="string" calcext:value-type="string">
            <text:p>Wagna</text:p>
          </table:table-cell>
          <table:table-cell office:value-type="float" office:value="61045" calcext:value-type="float">
            <text:p>6104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5]" office:value-type="float" office:value="60669" calcext:value-type="float">
            <text:p>6066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5];[.B65];[.C65])" office:value-type="string" office:string-value="&lt;record model=&quot;res.partner&quot; id=&quot;gemeinde60669&quot;&gt;&lt;field name=&quot;member_of_city_alliance&quot;&gt;True&lt;/field&gt;&lt;/record&gt;" calcext:value-type="string">
            <text:p>&lt;record model="res.partner" id="gemeinde60669"&gt;&lt;field name="member_of_city_alliance"&gt;True&lt;/field&gt;&lt;/record&gt;</text:p>
          </table:table-cell>
          <table:table-cell/>
          <table:table-cell office:value-type="string" calcext:value-type="string">
            <text:p>Seiersberg-Pirka</text:p>
          </table:table-cell>
          <table:table-cell office:value-type="float" office:value="60669" calcext:value-type="float">
            <text:p>6066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6]" office:value-type="float" office:value="60667" calcext:value-type="float">
            <text:p>6066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6];[.B66];[.C66])" office:value-type="string" office:string-value="&lt;record model=&quot;res.partner&quot; id=&quot;gemeinde60667&quot;&gt;&lt;field name=&quot;member_of_city_alliance&quot;&gt;True&lt;/field&gt;&lt;/record&gt;" calcext:value-type="string">
            <text:p>&lt;record model="res.partner" id="gemeinde60667"&gt;&lt;field name="member_of_city_alliance"&gt;True&lt;/field&gt;&lt;/record&gt;</text:p>
          </table:table-cell>
          <table:table-cell/>
          <table:table-cell office:value-type="string" calcext:value-type="string">
            <text:p>Raaba-Grambach</text:p>
          </table:table-cell>
          <table:table-cell office:value-type="float" office:value="60667" calcext:value-type="float">
            <text:p>6066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7]" office:value-type="float" office:value="60663" calcext:value-type="float">
            <text:p>6066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7];[.B67];[.C67])" office:value-type="string" office:string-value="&lt;record model=&quot;res.partner&quot; id=&quot;gemeinde60663&quot;&gt;&lt;field name=&quot;member_of_city_alliance&quot;&gt;True&lt;/field&gt;&lt;/record&gt;" calcext:value-type="string">
            <text:p>&lt;record model="res.partner" id="gemeinde60663"&gt;&lt;field name="member_of_city_alliance"&gt;True&lt;/field&gt;&lt;/record&gt;</text:p>
          </table:table-cell>
          <table:table-cell/>
          <table:table-cell office:value-type="string" calcext:value-type="string">
            <text:p>Frohnleiten</text:p>
          </table:table-cell>
          <table:table-cell office:value-type="float" office:value="60663" calcext:value-type="float">
            <text:p>6066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8]" office:value-type="float" office:value="60629" calcext:value-type="float">
            <text:p>6062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8];[.B68];[.C68])" office:value-type="string" office:string-value="&lt;record model=&quot;res.partner&quot; id=&quot;gemeinde60629&quot;&gt;&lt;field name=&quot;member_of_city_alliance&quot;&gt;True&lt;/field&gt;&lt;/record&gt;" calcext:value-type="string">
            <text:p>&lt;record model="res.partner" id="gemeinde60629"&gt;&lt;field name="member_of_city_alliance"&gt;True&lt;/field&gt;&lt;/record&gt;</text:p>
          </table:table-cell>
          <table:table-cell/>
          <table:table-cell office:value-type="string" calcext:value-type="string">
            <text:p>Lieboch</text:p>
          </table:table-cell>
          <table:table-cell office:value-type="float" office:value="60629" calcext:value-type="float">
            <text:p>6062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69]" office:value-type="float" office:value="60617" calcext:value-type="float">
            <text:p>606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69];[.B69];[.C69])" office:value-type="string" office:string-value="&lt;record model=&quot;res.partner&quot; id=&quot;gemeinde60617&quot;&gt;&lt;field name=&quot;member_of_city_alliance&quot;&gt;True&lt;/field&gt;&lt;/record&gt;" calcext:value-type="string">
            <text:p>&lt;record model="res.partner" id="gemeinde60617"&gt;&lt;field name="member_of_city_alliance"&gt;True&lt;/field&gt;&lt;/record&gt;</text:p>
          </table:table-cell>
          <table:table-cell/>
          <table:table-cell office:value-type="string" calcext:value-type="string">
            <text:p>Hart bei Graz</text:p>
          </table:table-cell>
          <table:table-cell office:value-type="float" office:value="60617" calcext:value-type="float">
            <text:p>606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0]" office:value-type="float" office:value="60613" calcext:value-type="float">
            <text:p>606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0];[.B70];[.C70])" office:value-type="string" office:string-value="&lt;record model=&quot;res.partner&quot; id=&quot;gemeinde60613&quot;&gt;&lt;field name=&quot;member_of_city_alliance&quot;&gt;True&lt;/field&gt;&lt;/record&gt;" calcext:value-type="string">
            <text:p>&lt;record model="res.partner" id="gemeinde60613"&gt;&lt;field name="member_of_city_alliance"&gt;True&lt;/field&gt;&lt;/record&gt;</text:p>
          </table:table-cell>
          <table:table-cell/>
          <table:table-cell office:value-type="string" calcext:value-type="string">
            <text:p>Gratkorn</text:p>
          </table:table-cell>
          <table:table-cell office:value-type="float" office:value="60613" calcext:value-type="float">
            <text:p>606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1]" office:value-type="float" office:value="60344" calcext:value-type="float">
            <text:p>6034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1];[.B71];[.C71])" office:value-type="string" office:string-value="&lt;record model=&quot;res.partner&quot; id=&quot;gemeinde60344&quot;&gt;&lt;field name=&quot;member_of_city_alliance&quot;&gt;True&lt;/field&gt;&lt;/record&gt;" calcext:value-type="string">
            <text:p>&lt;record model="res.partner" id="gemeinde60344"&gt;&lt;field name="member_of_city_alliance"&gt;True&lt;/field&gt;&lt;/record&gt;</text:p>
          </table:table-cell>
          <table:table-cell/>
          <table:table-cell office:value-type="string" calcext:value-type="string">
            <text:p>Deutschlandsberg</text:p>
          </table:table-cell>
          <table:table-cell office:value-type="float" office:value="60344" calcext:value-type="float">
            <text:p>6034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2]" office:value-type="float" office:value="60318" calcext:value-type="float">
            <text:p>6031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2];[.B72];[.C72])" office:value-type="string" office:string-value="&lt;record model=&quot;res.partner&quot; id=&quot;gemeinde60318&quot;&gt;&lt;field name=&quot;member_of_city_alliance&quot;&gt;True&lt;/field&gt;&lt;/record&gt;" calcext:value-type="string">
            <text:p>&lt;record model="res.partner" id="gemeinde60318"&gt;&lt;field name="member_of_city_alliance"&gt;True&lt;/field&gt;&lt;/record&gt;</text:p>
          </table:table-cell>
          <table:table-cell/>
          <table:table-cell office:value-type="string" calcext:value-type="string">
            <text:p>Lannach</text:p>
          </table:table-cell>
          <table:table-cell office:value-type="float" office:value="60318" calcext:value-type="float">
            <text:p>6031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3]" office:value-type="float" office:value="60101" calcext:value-type="float">
            <text:p>6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3];[.B73];[.C73])" office:value-type="string" office:string-value="&lt;record model=&quot;res.partner&quot; id=&quot;gemeinde60101&quot;&gt;&lt;field name=&quot;member_of_city_alliance&quot;&gt;True&lt;/field&gt;&lt;/record&gt;" calcext:value-type="string">
            <text:p>&lt;record model="res.partner" id="gemeinde60101"&gt;&lt;field name="member_of_city_alliance"&gt;True&lt;/field&gt;&lt;/record&gt;</text:p>
          </table:table-cell>
          <table:table-cell/>
          <table:table-cell office:value-type="string" calcext:value-type="string">
            <text:p>Graz</text:p>
          </table:table-cell>
          <table:table-cell office:value-type="float" office:value="60101" calcext:value-type="float">
            <text:p>6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4]" office:value-type="float" office:value="50628" calcext:value-type="float">
            <text:p>5062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4];[.B74];[.C74])" office:value-type="string" office:string-value="&lt;record model=&quot;res.partner&quot; id=&quot;gemeinde50628&quot;&gt;&lt;field name=&quot;member_of_city_alliance&quot;&gt;True&lt;/field&gt;&lt;/record&gt;" calcext:value-type="string">
            <text:p>&lt;record model="res.partner" id="gemeinde50628"&gt;&lt;field name="member_of_city_alliance"&gt;True&lt;/field&gt;&lt;/record&gt;</text:p>
          </table:table-cell>
          <table:table-cell/>
          <table:table-cell office:value-type="string" calcext:value-type="string">
            <text:p>Zell am See</text:p>
          </table:table-cell>
          <table:table-cell office:value-type="float" office:value="50628" calcext:value-type="float">
            <text:p>5062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5]" office:value-type="float" office:value="50619" calcext:value-type="float">
            <text:p>5061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5];[.B75];[.C75])" office:value-type="string" office:string-value="&lt;record model=&quot;res.partner&quot; id=&quot;gemeinde50619&quot;&gt;&lt;field name=&quot;member_of_city_alliance&quot;&gt;True&lt;/field&gt;&lt;/record&gt;" calcext:value-type="string">
            <text:p>&lt;record model="res.partner" id="gemeinde50619"&gt;&lt;field name="member_of_city_alliance"&gt;True&lt;/field&gt;&lt;/record&gt;</text:p>
          </table:table-cell>
          <table:table-cell/>
          <table:table-cell office:value-type="string" calcext:value-type="string">
            <text:p>Saalfelden am Steinernen Meer</text:p>
          </table:table-cell>
          <table:table-cell office:value-type="float" office:value="50619" calcext:value-type="float">
            <text:p>5061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6]" office:value-type="float" office:value="50613" calcext:value-type="float">
            <text:p>506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6];[.B76];[.C76])" office:value-type="string" office:string-value="&lt;record model=&quot;res.partner&quot; id=&quot;gemeinde50613&quot;&gt;&lt;field name=&quot;member_of_city_alliance&quot;&gt;True&lt;/field&gt;&lt;/record&gt;" calcext:value-type="string">
            <text:p>&lt;record model="res.partner" id="gemeinde50613"&gt;&lt;field name="member_of_city_alliance"&gt;True&lt;/field&gt;&lt;/record&gt;</text:p>
          </table:table-cell>
          <table:table-cell/>
          <table:table-cell office:value-type="string" calcext:value-type="string">
            <text:p>Mittersill</text:p>
          </table:table-cell>
          <table:table-cell office:value-type="float" office:value="50613" calcext:value-type="float">
            <text:p>506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7]" office:value-type="float" office:value="50510" calcext:value-type="float">
            <text:p>5051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7];[.B77];[.C77])" office:value-type="string" office:string-value="&lt;record model=&quot;res.partner&quot; id=&quot;gemeinde50510&quot;&gt;&lt;field name=&quot;member_of_city_alliance&quot;&gt;True&lt;/field&gt;&lt;/record&gt;" calcext:value-type="string">
            <text:p>&lt;record model="res.partner" id="gemeinde50510"&gt;&lt;field name="member_of_city_alliance"&gt;True&lt;/field&gt;&lt;/record&gt;</text:p>
          </table:table-cell>
          <table:table-cell/>
          <table:table-cell office:value-type="string" calcext:value-type="string">
            <text:p>Tamsweg</text:p>
          </table:table-cell>
          <table:table-cell office:value-type="float" office:value="50510" calcext:value-type="float">
            <text:p>5051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8]" office:value-type="float" office:value="50424" calcext:value-type="float">
            <text:p>5042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8];[.B78];[.C78])" office:value-type="string" office:string-value="&lt;record model=&quot;res.partner&quot; id=&quot;gemeinde50424&quot;&gt;&lt;field name=&quot;member_of_city_alliance&quot;&gt;True&lt;/field&gt;&lt;/record&gt;" calcext:value-type="string">
            <text:p>&lt;record model="res.partner" id="gemeinde50424"&gt;&lt;field name="member_of_city_alliance"&gt;True&lt;/field&gt;&lt;/record&gt;</text:p>
          </table:table-cell>
          <table:table-cell/>
          <table:table-cell office:value-type="string" calcext:value-type="string">
            <text:p>Werfen</text:p>
          </table:table-cell>
          <table:table-cell office:value-type="float" office:value="50424" calcext:value-type="float">
            <text:p>5042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79]" office:value-type="float" office:value="50404" calcext:value-type="float">
            <text:p>504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79];[.B79];[.C79])" office:value-type="string" office:string-value="&lt;record model=&quot;res.partner&quot; id=&quot;gemeinde50404&quot;&gt;&lt;field name=&quot;member_of_city_alliance&quot;&gt;True&lt;/field&gt;&lt;/record&gt;" calcext:value-type="string">
            <text:p>&lt;record model="res.partner" id="gemeinde50404"&gt;&lt;field name="member_of_city_alliance"&gt;True&lt;/field&gt;&lt;/record&gt;</text:p>
          </table:table-cell>
          <table:table-cell/>
          <table:table-cell office:value-type="string" calcext:value-type="string">
            <text:p>Bischofshofen</text:p>
          </table:table-cell>
          <table:table-cell office:value-type="float" office:value="50404" calcext:value-type="float">
            <text:p>504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0]" office:value-type="float" office:value="50402" calcext:value-type="float">
            <text:p>504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0];[.B80];[.C80])" office:value-type="string" office:string-value="&lt;record model=&quot;res.partner&quot; id=&quot;gemeinde50402&quot;&gt;&lt;field name=&quot;member_of_city_alliance&quot;&gt;True&lt;/field&gt;&lt;/record&gt;" calcext:value-type="string">
            <text:p>&lt;record model="res.partner" id="gemeinde50402"&gt;&lt;field name="member_of_city_alliance"&gt;True&lt;/field&gt;&lt;/record&gt;</text:p>
          </table:table-cell>
          <table:table-cell/>
          <table:table-cell office:value-type="string" calcext:value-type="string">
            <text:p>Bad Hofgastein</text:p>
          </table:table-cell>
          <table:table-cell office:value-type="float" office:value="50402" calcext:value-type="float">
            <text:p>504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1]" office:value-type="float" office:value="50339" calcext:value-type="float">
            <text:p>5033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1];[.B81];[.C81])" office:value-type="string" office:string-value="&lt;record model=&quot;res.partner&quot; id=&quot;gemeinde50339&quot;&gt;&lt;field name=&quot;member_of_city_alliance&quot;&gt;True&lt;/field&gt;&lt;/record&gt;" calcext:value-type="string">
            <text:p>&lt;record model="res.partner" id="gemeinde50339"&gt;&lt;field name="member_of_city_alliance"&gt;True&lt;/field&gt;&lt;/record&gt;</text:p>
          </table:table-cell>
          <table:table-cell/>
          <table:table-cell office:value-type="string" calcext:value-type="string">
            <text:p>Seekirchen am Wallersee</text:p>
          </table:table-cell>
          <table:table-cell office:value-type="float" office:value="50339" calcext:value-type="float">
            <text:p>5033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2]" office:value-type="float" office:value="50338" calcext:value-type="float">
            <text:p>5033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2];[.B82];[.C82])" office:value-type="string" office:string-value="&lt;record model=&quot;res.partner&quot; id=&quot;gemeinde50338&quot;&gt;&lt;field name=&quot;member_of_city_alliance&quot;&gt;True&lt;/field&gt;&lt;/record&gt;" calcext:value-type="string">
            <text:p>&lt;record model="res.partner" id="gemeinde50338"&gt;&lt;field name="member_of_city_alliance"&gt;True&lt;/field&gt;&lt;/record&gt;</text:p>
          </table:table-cell>
          <table:table-cell/>
          <table:table-cell office:value-type="string" calcext:value-type="string">
            <text:p>Wals-Siezenheim</text:p>
          </table:table-cell>
          <table:table-cell office:value-type="float" office:value="50338" calcext:value-type="float">
            <text:p>5033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3]" office:value-type="float" office:value="50326" calcext:value-type="float">
            <text:p>5032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3];[.B83];[.C83])" office:value-type="string" office:string-value="&lt;record model=&quot;res.partner&quot; id=&quot;gemeinde50326&quot;&gt;&lt;field name=&quot;member_of_city_alliance&quot;&gt;True&lt;/field&gt;&lt;/record&gt;" calcext:value-type="string">
            <text:p>&lt;record model="res.partner" id="gemeinde50326"&gt;&lt;field name="member_of_city_alliance"&gt;True&lt;/field&gt;&lt;/record&gt;</text:p>
          </table:table-cell>
          <table:table-cell/>
          <table:table-cell office:value-type="string" calcext:value-type="string">
            <text:p>Oberndorf bei Salzburg</text:p>
          </table:table-cell>
          <table:table-cell office:value-type="float" office:value="50326" calcext:value-type="float">
            <text:p>5032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4]" office:value-type="float" office:value="50324" calcext:value-type="float">
            <text:p>5032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4];[.B84];[.C84])" office:value-type="string" office:string-value="&lt;record model=&quot;res.partner&quot; id=&quot;gemeinde50324&quot;&gt;&lt;field name=&quot;member_of_city_alliance&quot;&gt;True&lt;/field&gt;&lt;/record&gt;" calcext:value-type="string">
            <text:p>&lt;record model="res.partner" id="gemeinde50324"&gt;&lt;field name="member_of_city_alliance"&gt;True&lt;/field&gt;&lt;/record&gt;</text:p>
          </table:table-cell>
          <table:table-cell/>
          <table:table-cell office:value-type="string" calcext:value-type="string">
            <text:p>Neumarkt am Wallersee</text:p>
          </table:table-cell>
          <table:table-cell office:value-type="float" office:value="50324" calcext:value-type="float">
            <text:p>5032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5]" office:value-type="float" office:value="50314" calcext:value-type="float">
            <text:p>503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5];[.B85];[.C85])" office:value-type="string" office:string-value="&lt;record model=&quot;res.partner&quot; id=&quot;gemeinde50314&quot;&gt;&lt;field name=&quot;member_of_city_alliance&quot;&gt;True&lt;/field&gt;&lt;/record&gt;" calcext:value-type="string">
            <text:p>&lt;record model="res.partner" id="gemeinde50314"&gt;&lt;field name="member_of_city_alliance"&gt;True&lt;/field&gt;&lt;/record&gt;</text:p>
          </table:table-cell>
          <table:table-cell/>
          <table:table-cell office:value-type="string" calcext:value-type="string">
            <text:p>Grödig</text:p>
          </table:table-cell>
          <table:table-cell office:value-type="float" office:value="50314" calcext:value-type="float">
            <text:p>503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6]" office:value-type="float" office:value="50205" calcext:value-type="float">
            <text:p>502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6];[.B86];[.C86])" office:value-type="string" office:string-value="&lt;record model=&quot;res.partner&quot; id=&quot;gemeinde50205&quot;&gt;&lt;field name=&quot;member_of_city_alliance&quot;&gt;True&lt;/field&gt;&lt;/record&gt;" calcext:value-type="string">
            <text:p>&lt;record model="res.partner" id="gemeinde50205"&gt;&lt;field name="member_of_city_alliance"&gt;True&lt;/field&gt;&lt;/record&gt;</text:p>
          </table:table-cell>
          <table:table-cell/>
          <table:table-cell office:value-type="string" calcext:value-type="string">
            <text:p>Hallein</text:p>
          </table:table-cell>
          <table:table-cell office:value-type="float" office:value="50205" calcext:value-type="float">
            <text:p>502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7]" office:value-type="float" office:value="50101" calcext:value-type="float">
            <text:p>5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7];[.B87];[.C87])" office:value-type="string" office:string-value="&lt;record model=&quot;res.partner&quot; id=&quot;gemeinde50101&quot;&gt;&lt;field name=&quot;member_of_city_alliance&quot;&gt;True&lt;/field&gt;&lt;/record&gt;" calcext:value-type="string">
            <text:p>&lt;record model="res.partner" id="gemeinde50101"&gt;&lt;field name="member_of_city_alliance"&gt;True&lt;/field&gt;&lt;/record&gt;</text:p>
          </table:table-cell>
          <table:table-cell/>
          <table:table-cell office:value-type="string" calcext:value-type="string">
            <text:p>Salzburg</text:p>
          </table:table-cell>
          <table:table-cell office:value-type="float" office:value="50101" calcext:value-type="float">
            <text:p>5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8]" office:value-type="float" office:value="41812" calcext:value-type="float">
            <text:p>4181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8];[.B88];[.C88])" office:value-type="string" office:string-value="&lt;record model=&quot;res.partner&quot; id=&quot;gemeinde41812&quot;&gt;&lt;field name=&quot;member_of_city_alliance&quot;&gt;True&lt;/field&gt;&lt;/record&gt;" calcext:value-type="string">
            <text:p>&lt;record model="res.partner" id="gemeinde41812"&gt;&lt;field name="member_of_city_alliance"&gt;True&lt;/field&gt;&lt;/record&gt;</text:p>
          </table:table-cell>
          <table:table-cell/>
          <table:table-cell office:value-type="string" calcext:value-type="string">
            <text:p>Marchtrenk</text:p>
          </table:table-cell>
          <table:table-cell office:value-type="float" office:value="41812" calcext:value-type="float">
            <text:p>4181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89]" office:value-type="float" office:value="41746" calcext:value-type="float">
            <text:p>4174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89];[.B89];[.C89])" office:value-type="string" office:string-value="&lt;record model=&quot;res.partner&quot; id=&quot;gemeinde41746&quot;&gt;&lt;field name=&quot;member_of_city_alliance&quot;&gt;True&lt;/field&gt;&lt;/record&gt;" calcext:value-type="string">
            <text:p>&lt;record model="res.partner" id="gemeinde41746"&gt;&lt;field name="member_of_city_alliance"&gt;True&lt;/field&gt;&lt;/record&gt;</text:p>
          </table:table-cell>
          <table:table-cell/>
          <table:table-cell office:value-type="string" calcext:value-type="string">
            <text:p>Vöcklabruck</text:p>
          </table:table-cell>
          <table:table-cell office:value-type="float" office:value="41746" calcext:value-type="float">
            <text:p>4174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0]" office:value-type="float" office:value="41713" calcext:value-type="float">
            <text:p>417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0];[.B90];[.C90])" office:value-type="string" office:string-value="&lt;record model=&quot;res.partner&quot; id=&quot;gemeinde41713&quot;&gt;&lt;field name=&quot;member_of_city_alliance&quot;&gt;True&lt;/field&gt;&lt;/record&gt;" calcext:value-type="string">
            <text:p>&lt;record model="res.partner" id="gemeinde41713"&gt;&lt;field name="member_of_city_alliance"&gt;True&lt;/field&gt;&lt;/record&gt;</text:p>
          </table:table-cell>
          <table:table-cell/>
          <table:table-cell office:value-type="string" calcext:value-type="string">
            <text:p>Lenzing</text:p>
          </table:table-cell>
          <table:table-cell office:value-type="float" office:value="41713" calcext:value-type="float">
            <text:p>417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1]" office:value-type="float" office:value="41709" calcext:value-type="float">
            <text:p>4170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1];[.B91];[.C91])" office:value-type="string" office:string-value="&lt;record model=&quot;res.partner&quot; id=&quot;gemeinde41709&quot;&gt;&lt;field name=&quot;member_of_city_alliance&quot;&gt;True&lt;/field&gt;&lt;/record&gt;" calcext:value-type="string">
            <text:p>&lt;record model="res.partner" id="gemeinde41709"&gt;&lt;field name="member_of_city_alliance"&gt;True&lt;/field&gt;&lt;/record&gt;</text:p>
          </table:table-cell>
          <table:table-cell/>
          <table:table-cell office:value-type="string" calcext:value-type="string">
            <text:p>Frankenburg am Hausruck</text:p>
          </table:table-cell>
          <table:table-cell office:value-type="float" office:value="41709" calcext:value-type="float">
            <text:p>4170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2]" office:value-type="float" office:value="41703" calcext:value-type="float">
            <text:p>417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2];[.B92];[.C92])" office:value-type="string" office:string-value="&lt;record model=&quot;res.partner&quot; id=&quot;gemeinde41703&quot;&gt;&lt;field name=&quot;member_of_city_alliance&quot;&gt;True&lt;/field&gt;&lt;/record&gt;" calcext:value-type="string">
            <text:p>&lt;record model="res.partner" id="gemeinde41703"&gt;&lt;field name="member_of_city_alliance"&gt;True&lt;/field&gt;&lt;/record&gt;</text:p>
          </table:table-cell>
          <table:table-cell/>
          <table:table-cell office:value-type="string" calcext:value-type="string">
            <text:p>Attnang-Puchheim</text:p>
          </table:table-cell>
          <table:table-cell office:value-type="float" office:value="41703" calcext:value-type="float">
            <text:p>417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3]" office:value-type="float" office:value="41618" calcext:value-type="float">
            <text:p>4161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3];[.B93];[.C93])" office:value-type="string" office:string-value="&lt;record model=&quot;res.partner&quot; id=&quot;gemeinde41618&quot;&gt;&lt;field name=&quot;member_of_city_alliance&quot;&gt;True&lt;/field&gt;&lt;/record&gt;" calcext:value-type="string">
            <text:p>&lt;record model="res.partner" id="gemeinde41618"&gt;&lt;field name="member_of_city_alliance"&gt;True&lt;/field&gt;&lt;/record&gt;</text:p>
          </table:table-cell>
          <table:table-cell/>
          <table:table-cell office:value-type="string" calcext:value-type="string">
            <text:p>Puchenau</text:p>
          </table:table-cell>
          <table:table-cell office:value-type="float" office:value="41618" calcext:value-type="float">
            <text:p>4161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4]" office:value-type="float" office:value="41607" calcext:value-type="float">
            <text:p>416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4];[.B94];[.C94])" office:value-type="string" office:string-value="&lt;record model=&quot;res.partner&quot; id=&quot;gemeinde41607&quot;&gt;&lt;field name=&quot;member_of_city_alliance&quot;&gt;True&lt;/field&gt;&lt;/record&gt;" calcext:value-type="string">
            <text:p>&lt;record model="res.partner" id="gemeinde41607"&gt;&lt;field name="member_of_city_alliance"&gt;True&lt;/field&gt;&lt;/record&gt;</text:p>
          </table:table-cell>
          <table:table-cell/>
          <table:table-cell office:value-type="string" calcext:value-type="string">
            <text:p>Gallneukirchen</text:p>
          </table:table-cell>
          <table:table-cell office:value-type="float" office:value="41607" calcext:value-type="float">
            <text:p>416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5]" office:value-type="float" office:value="41605" calcext:value-type="float">
            <text:p>416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5];[.B95];[.C95])" office:value-type="string" office:string-value="&lt;record model=&quot;res.partner&quot; id=&quot;gemeinde41605&quot;&gt;&lt;field name=&quot;member_of_city_alliance&quot;&gt;True&lt;/field&gt;&lt;/record&gt;" calcext:value-type="string">
            <text:p>&lt;record model="res.partner" id="gemeinde41605"&gt;&lt;field name="member_of_city_alliance"&gt;True&lt;/field&gt;&lt;/record&gt;</text:p>
          </table:table-cell>
          <table:table-cell/>
          <table:table-cell office:value-type="string" calcext:value-type="string">
            <text:p>Engerwitzdorf</text:p>
          </table:table-cell>
          <table:table-cell office:value-type="float" office:value="41605" calcext:value-type="float">
            <text:p>416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6]" office:value-type="float" office:value="41603" calcext:value-type="float">
            <text:p>416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6];[.B96];[.C96])" office:value-type="string" office:string-value="&lt;record model=&quot;res.partner&quot; id=&quot;gemeinde41603&quot;&gt;&lt;field name=&quot;member_of_city_alliance&quot;&gt;True&lt;/field&gt;&lt;/record&gt;" calcext:value-type="string">
            <text:p>&lt;record model="res.partner" id="gemeinde41603"&gt;&lt;field name="member_of_city_alliance"&gt;True&lt;/field&gt;&lt;/record&gt;</text:p>
          </table:table-cell>
          <table:table-cell/>
          <table:table-cell office:value-type="string" calcext:value-type="string">
            <text:p>Bad Leonfelden</text:p>
          </table:table-cell>
          <table:table-cell office:value-type="float" office:value="41603" calcext:value-type="float">
            <text:p>416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7]" office:value-type="float" office:value="41422" calcext:value-type="float">
            <text:p>4142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7];[.B97];[.C97])" office:value-type="string" office:string-value="&lt;record model=&quot;res.partner&quot; id=&quot;gemeinde41422&quot;&gt;&lt;field name=&quot;member_of_city_alliance&quot;&gt;True&lt;/field&gt;&lt;/record&gt;" calcext:value-type="string">
            <text:p>&lt;record model="res.partner" id="gemeinde41422"&gt;&lt;field name="member_of_city_alliance"&gt;True&lt;/field&gt;&lt;/record&gt;</text:p>
          </table:table-cell>
          <table:table-cell/>
          <table:table-cell office:value-type="string" calcext:value-type="string">
            <text:p>Schärding</text:p>
          </table:table-cell>
          <table:table-cell office:value-type="float" office:value="41422" calcext:value-type="float">
            <text:p>4142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8]" office:value-type="float" office:value="41116" calcext:value-type="float">
            <text:p>411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8];[.B98];[.C98])" office:value-type="string" office:string-value="&lt;record model=&quot;res.partner&quot; id=&quot;gemeinde41116&quot;&gt;&lt;field name=&quot;member_of_city_alliance&quot;&gt;True&lt;/field&gt;&lt;/record&gt;" calcext:value-type="string">
            <text:p>&lt;record model="res.partner" id="gemeinde41116"&gt;&lt;field name="member_of_city_alliance"&gt;True&lt;/field&gt;&lt;/record&gt;</text:p>
          </table:table-cell>
          <table:table-cell/>
          <table:table-cell office:value-type="string" calcext:value-type="string">
            <text:p>Perg</text:p>
          </table:table-cell>
          <table:table-cell office:value-type="float" office:value="41116" calcext:value-type="float">
            <text:p>411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99]" office:value-type="float" office:value="41022" calcext:value-type="float">
            <text:p>4102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99];[.B99];[.C99])" office:value-type="string" office:string-value="&lt;record model=&quot;res.partner&quot; id=&quot;gemeinde41022&quot;&gt;&lt;field name=&quot;member_of_city_alliance&quot;&gt;True&lt;/field&gt;&lt;/record&gt;" calcext:value-type="string">
            <text:p>&lt;record model="res.partner" id="gemeinde41022"&gt;&lt;field name="member_of_city_alliance"&gt;True&lt;/field&gt;&lt;/record&gt;</text:p>
          </table:table-cell>
          <table:table-cell/>
          <table:table-cell office:value-type="string" calcext:value-type="string">
            <text:p>Wilhering</text:p>
          </table:table-cell>
          <table:table-cell office:value-type="float" office:value="41022" calcext:value-type="float">
            <text:p>4102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0]" office:value-type="float" office:value="41021" calcext:value-type="float">
            <text:p>4102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0];[.B100];[.C100])" office:value-type="string" office:string-value="&lt;record model=&quot;res.partner&quot; id=&quot;gemeinde41021&quot;&gt;&lt;field name=&quot;member_of_city_alliance&quot;&gt;True&lt;/field&gt;&lt;/record&gt;" calcext:value-type="string">
            <text:p>&lt;record model="res.partner" id="gemeinde41021"&gt;&lt;field name="member_of_city_alliance"&gt;True&lt;/field&gt;&lt;/record&gt;</text:p>
          </table:table-cell>
          <table:table-cell/>
          <table:table-cell office:value-type="string" calcext:value-type="string">
            <text:p>Traun</text:p>
          </table:table-cell>
          <table:table-cell office:value-type="float" office:value="41021" calcext:value-type="float">
            <text:p>4102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1]" office:value-type="float" office:value="41017" calcext:value-type="float">
            <text:p>410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1];[.B101];[.C101])" office:value-type="string" office:string-value="&lt;record model=&quot;res.partner&quot; id=&quot;gemeinde41017&quot;&gt;&lt;field name=&quot;member_of_city_alliance&quot;&gt;True&lt;/field&gt;&lt;/record&gt;" calcext:value-type="string">
            <text:p>&lt;record model="res.partner" id="gemeinde41017"&gt;&lt;field name="member_of_city_alliance"&gt;True&lt;/field&gt;&lt;/record&gt;</text:p>
          </table:table-cell>
          <table:table-cell/>
          <table:table-cell office:value-type="string" calcext:value-type="string">
            <text:p>Pasching</text:p>
          </table:table-cell>
          <table:table-cell office:value-type="float" office:value="41017" calcext:value-type="float">
            <text:p>410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2]" office:value-type="float" office:value="41014" calcext:value-type="float">
            <text:p>410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2];[.B102];[.C102])" office:value-type="string" office:string-value="&lt;record model=&quot;res.partner&quot; id=&quot;gemeinde41014&quot;&gt;&lt;field name=&quot;member_of_city_alliance&quot;&gt;True&lt;/field&gt;&lt;/record&gt;" calcext:value-type="string">
            <text:p>&lt;record model="res.partner" id="gemeinde41014"&gt;&lt;field name="member_of_city_alliance"&gt;True&lt;/field&gt;&lt;/record&gt;</text:p>
          </table:table-cell>
          <table:table-cell/>
          <table:table-cell office:value-type="string" calcext:value-type="string">
            <text:p>Neuhofen an der Krems</text:p>
          </table:table-cell>
          <table:table-cell office:value-type="float" office:value="41014" calcext:value-type="float">
            <text:p>410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3]" office:value-type="float" office:value="41012" calcext:value-type="float">
            <text:p>4101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3];[.B103];[.C103])" office:value-type="string" office:string-value="&lt;record model=&quot;res.partner&quot; id=&quot;gemeinde41012&quot;&gt;&lt;field name=&quot;member_of_city_alliance&quot;&gt;True&lt;/field&gt;&lt;/record&gt;" calcext:value-type="string">
            <text:p>&lt;record model="res.partner" id="gemeinde41012"&gt;&lt;field name="member_of_city_alliance"&gt;True&lt;/field&gt;&lt;/record&gt;</text:p>
          </table:table-cell>
          <table:table-cell/>
          <table:table-cell office:value-type="string" calcext:value-type="string">
            <text:p>Leonding</text:p>
          </table:table-cell>
          <table:table-cell office:value-type="float" office:value="41012" calcext:value-type="float">
            <text:p>4101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4]" office:value-type="float" office:value="41007" calcext:value-type="float">
            <text:p>410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4];[.B104];[.C104])" office:value-type="string" office:string-value="&lt;record model=&quot;res.partner&quot; id=&quot;gemeinde41007&quot;&gt;&lt;field name=&quot;member_of_city_alliance&quot;&gt;True&lt;/field&gt;&lt;/record&gt;" calcext:value-type="string">
            <text:p>&lt;record model="res.partner" id="gemeinde41007"&gt;&lt;field name="member_of_city_alliance"&gt;True&lt;/field&gt;&lt;/record&gt;</text:p>
          </table:table-cell>
          <table:table-cell/>
          <table:table-cell office:value-type="string" calcext:value-type="string">
            <text:p>Hörsching</text:p>
          </table:table-cell>
          <table:table-cell office:value-type="float" office:value="41007" calcext:value-type="float">
            <text:p>410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5]" office:value-type="float" office:value="41005" calcext:value-type="float">
            <text:p>410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5];[.B105];[.C105])" office:value-type="string" office:string-value="&lt;record model=&quot;res.partner&quot; id=&quot;gemeinde41005&quot;&gt;&lt;field name=&quot;member_of_city_alliance&quot;&gt;True&lt;/field&gt;&lt;/record&gt;" calcext:value-type="string">
            <text:p>&lt;record model="res.partner" id="gemeinde41005"&gt;&lt;field name="member_of_city_alliance"&gt;True&lt;/field&gt;&lt;/record&gt;</text:p>
          </table:table-cell>
          <table:table-cell/>
          <table:table-cell office:value-type="string" calcext:value-type="string">
            <text:p>Enns</text:p>
          </table:table-cell>
          <table:table-cell office:value-type="float" office:value="41005" calcext:value-type="float">
            <text:p>410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6]" office:value-type="float" office:value="41003" calcext:value-type="float">
            <text:p>410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6];[.B106];[.C106])" office:value-type="string" office:string-value="&lt;record model=&quot;res.partner&quot; id=&quot;gemeinde41003&quot;&gt;&lt;field name=&quot;member_of_city_alliance&quot;&gt;True&lt;/field&gt;&lt;/record&gt;" calcext:value-type="string">
            <text:p>&lt;record model="res.partner" id="gemeinde41003"&gt;&lt;field name="member_of_city_alliance"&gt;True&lt;/field&gt;&lt;/record&gt;</text:p>
          </table:table-cell>
          <table:table-cell/>
          <table:table-cell office:value-type="string" calcext:value-type="string">
            <text:p>Asten</text:p>
          </table:table-cell>
          <table:table-cell office:value-type="float" office:value="41003" calcext:value-type="float">
            <text:p>410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7]" office:value-type="float" office:value="41002" calcext:value-type="float">
            <text:p>410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7];[.B107];[.C107])" office:value-type="string" office:string-value="&lt;record model=&quot;res.partner&quot; id=&quot;gemeinde41002&quot;&gt;&lt;field name=&quot;member_of_city_alliance&quot;&gt;True&lt;/field&gt;&lt;/record&gt;" calcext:value-type="string">
            <text:p>&lt;record model="res.partner" id="gemeinde41002"&gt;&lt;field name="member_of_city_alliance"&gt;True&lt;/field&gt;&lt;/record&gt;</text:p>
          </table:table-cell>
          <table:table-cell/>
          <table:table-cell office:value-type="string" calcext:value-type="string">
            <text:p>Ansfelden</text:p>
          </table:table-cell>
          <table:table-cell office:value-type="float" office:value="41002" calcext:value-type="float">
            <text:p>410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8]" office:value-type="float" office:value="40907" calcext:value-type="float">
            <text:p>409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8];[.B108];[.C108])" office:value-type="string" office:string-value="&lt;record model=&quot;res.partner&quot; id=&quot;gemeinde40907&quot;&gt;&lt;field name=&quot;member_of_city_alliance&quot;&gt;True&lt;/field&gt;&lt;/record&gt;" calcext:value-type="string">
            <text:p>&lt;record model="res.partner" id="gemeinde40907"&gt;&lt;field name="member_of_city_alliance"&gt;True&lt;/field&gt;&lt;/record&gt;</text:p>
          </table:table-cell>
          <table:table-cell/>
          <table:table-cell office:value-type="string" calcext:value-type="string">
            <text:p>Kremsmünster</text:p>
          </table:table-cell>
          <table:table-cell office:value-type="float" office:value="40907" calcext:value-type="float">
            <text:p>409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09]" office:value-type="float" office:value="40835" calcext:value-type="float">
            <text:p>4083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09];[.B109];[.C109])" office:value-type="string" office:string-value="&lt;record model=&quot;res.partner&quot; id=&quot;gemeinde40835&quot;&gt;&lt;field name=&quot;member_of_city_alliance&quot;&gt;True&lt;/field&gt;&lt;/record&gt;" calcext:value-type="string">
            <text:p>&lt;record model="res.partner" id="gemeinde40835"&gt;&lt;field name="member_of_city_alliance"&gt;True&lt;/field&gt;&lt;/record&gt;</text:p>
          </table:table-cell>
          <table:table-cell/>
          <table:table-cell office:value-type="string" calcext:value-type="string">
            <text:p>Peuerbach</text:p>
          </table:table-cell>
          <table:table-cell office:value-type="float" office:value="40835" calcext:value-type="float">
            <text:p>4083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0]" office:value-type="float" office:value="40808" calcext:value-type="float">
            <text:p>408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0];[.B110];[.C110])" office:value-type="string" office:string-value="&lt;record model=&quot;res.partner&quot; id=&quot;gemeinde40808&quot;&gt;&lt;field name=&quot;member_of_city_alliance&quot;&gt;True&lt;/field&gt;&lt;/record&gt;" calcext:value-type="string">
            <text:p>&lt;record model="res.partner" id="gemeinde40808"&gt;&lt;field name="member_of_city_alliance"&gt;True&lt;/field&gt;&lt;/record&gt;</text:p>
          </table:table-cell>
          <table:table-cell/>
          <table:table-cell office:value-type="string" calcext:value-type="string">
            <text:p>Grieskirchen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1]" office:value-type="float" office:value="40711" calcext:value-type="float">
            <text:p>4071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1];[.B111];[.C111])" office:value-type="string" office:string-value="&lt;record model=&quot;res.partner&quot; id=&quot;gemeinde40711&quot;&gt;&lt;field name=&quot;member_of_city_alliance&quot;&gt;True&lt;/field&gt;&lt;/record&gt;" calcext:value-type="string">
            <text:p>&lt;record model="res.partner" id="gemeinde40711"&gt;&lt;field name="member_of_city_alliance"&gt;True&lt;/field&gt;&lt;/record&gt;</text:p>
          </table:table-cell>
          <table:table-cell/>
          <table:table-cell office:value-type="string" calcext:value-type="string">
            <text:p>Laakirchen</text:p>
          </table:table-cell>
          <table:table-cell office:value-type="float" office:value="40711" calcext:value-type="float">
            <text:p>4071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2]" office:value-type="float" office:value="40705" calcext:value-type="float">
            <text:p>407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2];[.B112];[.C112])" office:value-type="string" office:string-value="&lt;record model=&quot;res.partner&quot; id=&quot;gemeinde40705&quot;&gt;&lt;field name=&quot;member_of_city_alliance&quot;&gt;True&lt;/field&gt;&lt;/record&gt;" calcext:value-type="string">
            <text:p>&lt;record model="res.partner" id="gemeinde40705"&gt;&lt;field name="member_of_city_alliance"&gt;True&lt;/field&gt;&lt;/record&gt;</text:p>
          </table:table-cell>
          <table:table-cell/>
          <table:table-cell office:value-type="string" calcext:value-type="string">
            <text:p>Gmunden</text:p>
          </table:table-cell>
          <table:table-cell office:value-type="float" office:value="40705" calcext:value-type="float">
            <text:p>407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3]" office:value-type="float" office:value="40704" calcext:value-type="float">
            <text:p>407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3];[.B113];[.C113])" office:value-type="string" office:string-value="&lt;record model=&quot;res.partner&quot; id=&quot;gemeinde40704&quot;&gt;&lt;field name=&quot;member_of_city_alliance&quot;&gt;True&lt;/field&gt;&lt;/record&gt;" calcext:value-type="string">
            <text:p>&lt;record model="res.partner" id="gemeinde40704"&gt;&lt;field name="member_of_city_alliance"&gt;True&lt;/field&gt;&lt;/record&gt;</text:p>
          </table:table-cell>
          <table:table-cell/>
          <table:table-cell office:value-type="string" calcext:value-type="string">
            <text:p>Ebensee am Traunsee</text:p>
          </table:table-cell>
          <table:table-cell office:value-type="float" office:value="40704" calcext:value-type="float">
            <text:p>407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4]" office:value-type="float" office:value="40703" calcext:value-type="float">
            <text:p>407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4];[.B114];[.C114])" office:value-type="string" office:string-value="&lt;record model=&quot;res.partner&quot; id=&quot;gemeinde40703&quot;&gt;&lt;field name=&quot;member_of_city_alliance&quot;&gt;True&lt;/field&gt;&lt;/record&gt;" calcext:value-type="string">
            <text:p>&lt;record model="res.partner" id="gemeinde40703"&gt;&lt;field name="member_of_city_alliance"&gt;True&lt;/field&gt;&lt;/record&gt;</text:p>
          </table:table-cell>
          <table:table-cell/>
          <table:table-cell office:value-type="string" calcext:value-type="string">
            <text:p>Bad Ischl</text:p>
          </table:table-cell>
          <table:table-cell office:value-type="float" office:value="40703" calcext:value-type="float">
            <text:p>407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5]" office:value-type="float" office:value="40614" calcext:value-type="float">
            <text:p>406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5];[.B115];[.C115])" office:value-type="string" office:string-value="&lt;record model=&quot;res.partner&quot; id=&quot;gemeinde40614&quot;&gt;&lt;field name=&quot;member_of_city_alliance&quot;&gt;True&lt;/field&gt;&lt;/record&gt;" calcext:value-type="string">
            <text:p>&lt;record model="res.partner" id="gemeinde40614"&gt;&lt;field name="member_of_city_alliance"&gt;True&lt;/field&gt;&lt;/record&gt;</text:p>
          </table:table-cell>
          <table:table-cell/>
          <table:table-cell office:value-type="string" calcext:value-type="string">
            <text:p>Pregarten</text:p>
          </table:table-cell>
          <table:table-cell office:value-type="float" office:value="40614" calcext:value-type="float">
            <text:p>406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6]" office:value-type="float" office:value="40601" calcext:value-type="float">
            <text:p>406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6];[.B116];[.C116])" office:value-type="string" office:string-value="&lt;record model=&quot;res.partner&quot; id=&quot;gemeinde40601&quot;&gt;&lt;field name=&quot;member_of_city_alliance&quot;&gt;True&lt;/field&gt;&lt;/record&gt;" calcext:value-type="string">
            <text:p>&lt;record model="res.partner" id="gemeinde40601"&gt;&lt;field name="member_of_city_alliance"&gt;True&lt;/field&gt;&lt;/record&gt;</text:p>
          </table:table-cell>
          <table:table-cell/>
          <table:table-cell office:value-type="string" calcext:value-type="string">
            <text:p>Freistadt</text:p>
          </table:table-cell>
          <table:table-cell office:value-type="float" office:value="40601" calcext:value-type="float">
            <text:p>406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7]" office:value-type="float" office:value="40506" calcext:value-type="float">
            <text:p>4050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7];[.B117];[.C117])" office:value-type="string" office:string-value="&lt;record model=&quot;res.partner&quot; id=&quot;gemeinde40506&quot;&gt;&lt;field name=&quot;member_of_city_alliance&quot;&gt;True&lt;/field&gt;&lt;/record&gt;" calcext:value-type="string">
            <text:p>&lt;record model="res.partner" id="gemeinde40506"&gt;&lt;field name="member_of_city_alliance"&gt;True&lt;/field&gt;&lt;/record&gt;</text:p>
          </table:table-cell>
          <table:table-cell/>
          <table:table-cell office:value-type="string" calcext:value-type="string">
            <text:p>Hartkirchen</text:p>
          </table:table-cell>
          <table:table-cell office:value-type="float" office:value="40506" calcext:value-type="float">
            <text:p>4050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8]" office:value-type="float" office:value="40503" calcext:value-type="float">
            <text:p>405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8];[.B118];[.C118])" office:value-type="string" office:string-value="&lt;record model=&quot;res.partner&quot; id=&quot;gemeinde40503&quot;&gt;&lt;field name=&quot;member_of_city_alliance&quot;&gt;True&lt;/field&gt;&lt;/record&gt;" calcext:value-type="string">
            <text:p>&lt;record model="res.partner" id="gemeinde40503"&gt;&lt;field name="member_of_city_alliance"&gt;True&lt;/field&gt;&lt;/record&gt;</text:p>
          </table:table-cell>
          <table:table-cell/>
          <table:table-cell office:value-type="string" calcext:value-type="string">
            <text:p>Eferding</text:p>
          </table:table-cell>
          <table:table-cell office:value-type="float" office:value="40503" calcext:value-type="float">
            <text:p>405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19]" office:value-type="float" office:value="40421" calcext:value-type="float">
            <text:p>4042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19];[.B119];[.C119])" office:value-type="string" office:string-value="&lt;record model=&quot;res.partner&quot; id=&quot;gemeinde40421&quot;&gt;&lt;field name=&quot;member_of_city_alliance&quot;&gt;True&lt;/field&gt;&lt;/record&gt;" calcext:value-type="string">
            <text:p>&lt;record model="res.partner" id="gemeinde40421"&gt;&lt;field name="member_of_city_alliance"&gt;True&lt;/field&gt;&lt;/record&gt;</text:p>
          </table:table-cell>
          <table:table-cell/>
          <table:table-cell office:value-type="string" calcext:value-type="string">
            <text:p>Mattighofen</text:p>
          </table:table-cell>
          <table:table-cell office:value-type="float" office:value="40421" calcext:value-type="float">
            <text:p>4042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0]" office:value-type="float" office:value="40404" calcext:value-type="float">
            <text:p>404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0];[.B120];[.C120])" office:value-type="string" office:string-value="&lt;record model=&quot;res.partner&quot; id=&quot;gemeinde40404&quot;&gt;&lt;field name=&quot;member_of_city_alliance&quot;&gt;True&lt;/field&gt;&lt;/record&gt;" calcext:value-type="string">
            <text:p>&lt;record model="res.partner" id="gemeinde40404"&gt;&lt;field name="member_of_city_alliance"&gt;True&lt;/field&gt;&lt;/record&gt;</text:p>
          </table:table-cell>
          <table:table-cell/>
          <table:table-cell office:value-type="string" calcext:value-type="string">
            <text:p>Braunau am Inn</text:p>
          </table:table-cell>
          <table:table-cell office:value-type="float" office:value="40404" calcext:value-type="float">
            <text:p>404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1]" office:value-type="float" office:value="40301" calcext:value-type="float">
            <text:p>403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1];[.B121];[.C121])" office:value-type="string" office:string-value="&lt;record model=&quot;res.partner&quot; id=&quot;gemeinde40301&quot;&gt;&lt;field name=&quot;member_of_city_alliance&quot;&gt;True&lt;/field&gt;&lt;/record&gt;" calcext:value-type="string">
            <text:p>&lt;record model="res.partner" id="gemeinde40301"&gt;&lt;field name="member_of_city_alliance"&gt;True&lt;/field&gt;&lt;/record&gt;</text:p>
          </table:table-cell>
          <table:table-cell/>
          <table:table-cell office:value-type="string" calcext:value-type="string">
            <text:p>Wels</text:p>
          </table:table-cell>
          <table:table-cell office:value-type="float" office:value="40301" calcext:value-type="float">
            <text:p>403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2]" office:value-type="float" office:value="40201" calcext:value-type="float">
            <text:p>402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2];[.B122];[.C122])" office:value-type="string" office:string-value="&lt;record model=&quot;res.partner&quot; id=&quot;gemeinde40201&quot;&gt;&lt;field name=&quot;member_of_city_alliance&quot;&gt;True&lt;/field&gt;&lt;/record&gt;" calcext:value-type="string">
            <text:p>&lt;record model="res.partner" id="gemeinde40201"&gt;&lt;field name="member_of_city_alliance"&gt;True&lt;/field&gt;&lt;/record&gt;</text:p>
          </table:table-cell>
          <table:table-cell/>
          <table:table-cell office:value-type="string" calcext:value-type="string">
            <text:p>Steyr</text:p>
          </table:table-cell>
          <table:table-cell office:value-type="float" office:value="40201" calcext:value-type="float">
            <text:p>402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3]" office:value-type="float" office:value="40101" calcext:value-type="float">
            <text:p>4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3];[.B123];[.C123])" office:value-type="string" office:string-value="&lt;record model=&quot;res.partner&quot; id=&quot;gemeinde40101&quot;&gt;&lt;field name=&quot;member_of_city_alliance&quot;&gt;True&lt;/field&gt;&lt;/record&gt;" calcext:value-type="string">
            <text:p>&lt;record model="res.partner" id="gemeinde40101"&gt;&lt;field name="member_of_city_alliance"&gt;True&lt;/field&gt;&lt;/record&gt;</text:p>
          </table:table-cell>
          <table:table-cell/>
          <table:table-cell office:value-type="string" calcext:value-type="string">
            <text:p>Linz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4]" office:value-type="float" office:value="32508" calcext:value-type="float">
            <text:p>325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4];[.B124];[.C124])" office:value-type="string" office:string-value="&lt;record model=&quot;res.partner&quot; id=&quot;gemeinde32508&quot;&gt;&lt;field name=&quot;member_of_city_alliance&quot;&gt;True&lt;/field&gt;&lt;/record&gt;" calcext:value-type="string">
            <text:p>&lt;record model="res.partner" id="gemeinde32508"&gt;&lt;field name="member_of_city_alliance"&gt;True&lt;/field&gt;&lt;/record&gt;</text:p>
          </table:table-cell>
          <table:table-cell/>
          <table:table-cell office:value-type="string" calcext:value-type="string">
            <text:p>Groß Gerungs</text:p>
          </table:table-cell>
          <table:table-cell office:value-type="float" office:value="32508" calcext:value-type="float">
            <text:p>325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5]" office:value-type="float" office:value="32304" calcext:value-type="float">
            <text:p>323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5];[.B125];[.C125])" office:value-type="string" office:string-value="&lt;record model=&quot;res.partner&quot; id=&quot;gemeinde32304&quot;&gt;&lt;field name=&quot;member_of_city_alliance&quot;&gt;True&lt;/field&gt;&lt;/record&gt;" calcext:value-type="string">
            <text:p>&lt;record model="res.partner" id="gemeinde32304"&gt;&lt;field name="member_of_city_alliance"&gt;True&lt;/field&gt;&lt;/record&gt;</text:p>
          </table:table-cell>
          <table:table-cell/>
          <table:table-cell office:value-type="string" calcext:value-type="string">
            <text:p>Ebenfurth</text:p>
          </table:table-cell>
          <table:table-cell office:value-type="float" office:value="32304" calcext:value-type="float">
            <text:p>323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6]" office:value-type="float" office:value="32220" calcext:value-type="float">
            <text:p>3222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6];[.B126];[.C126])" office:value-type="string" office:string-value="&lt;record model=&quot;res.partner&quot; id=&quot;gemeinde32220&quot;&gt;&lt;field name=&quot;member_of_city_alliance&quot;&gt;True&lt;/field&gt;&lt;/record&gt;" calcext:value-type="string">
            <text:p>&lt;record model="res.partner" id="gemeinde32220"&gt;&lt;field name="member_of_city_alliance"&gt;True&lt;/field&gt;&lt;/record&gt;</text:p>
          </table:table-cell>
          <table:table-cell/>
          <table:table-cell office:value-type="string" calcext:value-type="string">
            <text:p>Waidhofen an der Thaya</text:p>
          </table:table-cell>
          <table:table-cell office:value-type="float" office:value="32220" calcext:value-type="float">
            <text:p>3222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7]" office:value-type="float" office:value="32216" calcext:value-type="float">
            <text:p>322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7];[.B127];[.C127])" office:value-type="string" office:string-value="&lt;record model=&quot;res.partner&quot; id=&quot;gemeinde32216&quot;&gt;&lt;field name=&quot;member_of_city_alliance&quot;&gt;True&lt;/field&gt;&lt;/record&gt;" calcext:value-type="string">
            <text:p>&lt;record model="res.partner" id="gemeinde32216"&gt;&lt;field name="member_of_city_alliance"&gt;True&lt;/field&gt;&lt;/record&gt;</text:p>
          </table:table-cell>
          <table:table-cell/>
          <table:table-cell office:value-type="string" calcext:value-type="string">
            <text:p>Raabs an der Thaya</text:p>
          </table:table-cell>
          <table:table-cell office:value-type="float" office:value="32216" calcext:value-type="float">
            <text:p>322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8]" office:value-type="float" office:value="32207" calcext:value-type="float">
            <text:p>322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8];[.B128];[.C128])" office:value-type="string" office:string-value="&lt;record model=&quot;res.partner&quot; id=&quot;gemeinde32207&quot;&gt;&lt;field name=&quot;member_of_city_alliance&quot;&gt;True&lt;/field&gt;&lt;/record&gt;" calcext:value-type="string">
            <text:p>&lt;record model="res.partner" id="gemeinde32207"&gt;&lt;field name="member_of_city_alliance"&gt;True&lt;/field&gt;&lt;/record&gt;</text:p>
          </table:table-cell>
          <table:table-cell/>
          <table:table-cell office:value-type="string" calcext:value-type="string">
            <text:p>Groß-Siegharts</text:p>
          </table:table-cell>
          <table:table-cell office:value-type="float" office:value="32207" calcext:value-type="float">
            <text:p>322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29]" office:value-type="float" office:value="32144" calcext:value-type="float">
            <text:p>3214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29];[.B129];[.C129])" office:value-type="string" office:string-value="&lt;record model=&quot;res.partner&quot; id=&quot;gemeinde32144&quot;&gt;&lt;field name=&quot;member_of_city_alliance&quot;&gt;True&lt;/field&gt;&lt;/record&gt;" calcext:value-type="string">
            <text:p>&lt;record model="res.partner" id="gemeinde32144"&gt;&lt;field name="member_of_city_alliance"&gt;True&lt;/field&gt;&lt;/record&gt;</text:p>
          </table:table-cell>
          <table:table-cell/>
          <table:table-cell office:value-type="string" calcext:value-type="string">
            <text:p>Klosterneuburg</text:p>
          </table:table-cell>
          <table:table-cell office:value-type="float" office:value="32144" calcext:value-type="float">
            <text:p>3214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0]" office:value-type="float" office:value="32141" calcext:value-type="float">
            <text:p>3214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0];[.B130];[.C130])" office:value-type="string" office:string-value="&lt;record model=&quot;res.partner&quot; id=&quot;gemeinde32141&quot;&gt;&lt;field name=&quot;member_of_city_alliance&quot;&gt;True&lt;/field&gt;&lt;/record&gt;" calcext:value-type="string">
            <text:p>&lt;record model="res.partner" id="gemeinde32141"&gt;&lt;field name="member_of_city_alliance"&gt;True&lt;/field&gt;&lt;/record&gt;</text:p>
          </table:table-cell>
          <table:table-cell/>
          <table:table-cell office:value-type="string" calcext:value-type="string">
            <text:p>Zwentendorf an der Donau</text:p>
          </table:table-cell>
          <table:table-cell office:value-type="float" office:value="32141" calcext:value-type="float">
            <text:p>3214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1]" office:value-type="float" office:value="32135" calcext:value-type="float">
            <text:p>3213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1];[.B131];[.C131])" office:value-type="string" office:string-value="&lt;record model=&quot;res.partner&quot; id=&quot;gemeinde32135&quot;&gt;&lt;field name=&quot;member_of_city_alliance&quot;&gt;True&lt;/field&gt;&lt;/record&gt;" calcext:value-type="string">
            <text:p>&lt;record model="res.partner" id="gemeinde32135"&gt;&lt;field name="member_of_city_alliance"&gt;True&lt;/field&gt;&lt;/record&gt;</text:p>
          </table:table-cell>
          <table:table-cell/>
          <table:table-cell office:value-type="string" calcext:value-type="string">
            <text:p>Tulln an der Donau</text:p>
          </table:table-cell>
          <table:table-cell office:value-type="float" office:value="32135" calcext:value-type="float">
            <text:p>3213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2]" office:value-type="float" office:value="32120" calcext:value-type="float">
            <text:p>3212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2];[.B132];[.C132])" office:value-type="string" office:string-value="&lt;record model=&quot;res.partner&quot; id=&quot;gemeinde32120&quot;&gt;&lt;field name=&quot;member_of_city_alliance&quot;&gt;True&lt;/field&gt;&lt;/record&gt;" calcext:value-type="string">
            <text:p>&lt;record model="res.partner" id="gemeinde32120"&gt;&lt;field name="member_of_city_alliance"&gt;True&lt;/field&gt;&lt;/record&gt;</text:p>
          </table:table-cell>
          <table:table-cell/>
          <table:table-cell office:value-type="string" calcext:value-type="string">
            <text:p>Michelhausen</text:p>
          </table:table-cell>
          <table:table-cell office:value-type="float" office:value="32120" calcext:value-type="float">
            <text:p>3212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3]" office:value-type="float" office:value="32107" calcext:value-type="float">
            <text:p>321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3];[.B133];[.C133])" office:value-type="string" office:string-value="&lt;record model=&quot;res.partner&quot; id=&quot;gemeinde32107&quot;&gt;&lt;field name=&quot;member_of_city_alliance&quot;&gt;True&lt;/field&gt;&lt;/record&gt;" calcext:value-type="string">
            <text:p>&lt;record model="res.partner" id="gemeinde32107"&gt;&lt;field name="member_of_city_alliance"&gt;True&lt;/field&gt;&lt;/record&gt;</text:p>
          </table:table-cell>
          <table:table-cell/>
          <table:table-cell office:value-type="string" calcext:value-type="string">
            <text:p>Grafenwörth</text:p>
          </table:table-cell>
          <table:table-cell office:value-type="float" office:value="32107" calcext:value-type="float">
            <text:p>321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4]" office:value-type="float" office:value="32013" calcext:value-type="float">
            <text:p>320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4];[.B134];[.C134])" office:value-type="string" office:string-value="&lt;record model=&quot;res.partner&quot; id=&quot;gemeinde32013&quot;&gt;&lt;field name=&quot;member_of_city_alliance&quot;&gt;True&lt;/field&gt;&lt;/record&gt;" calcext:value-type="string">
            <text:p>&lt;record model="res.partner" id="gemeinde32013"&gt;&lt;field name="member_of_city_alliance"&gt;True&lt;/field&gt;&lt;/record&gt;</text:p>
          </table:table-cell>
          <table:table-cell/>
          <table:table-cell office:value-type="string" calcext:value-type="string">
            <text:p>Scheibbs</text:p>
          </table:table-cell>
          <table:table-cell office:value-type="float" office:value="32013" calcext:value-type="float">
            <text:p>320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5]" office:value-type="float" office:value="31952" calcext:value-type="float">
            <text:p>3195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5];[.B135];[.C135])" office:value-type="string" office:string-value="&lt;record model=&quot;res.partner&quot; id=&quot;gemeinde31952&quot;&gt;&lt;field name=&quot;member_of_city_alliance&quot;&gt;True&lt;/field&gt;&lt;/record&gt;" calcext:value-type="string">
            <text:p>&lt;record model="res.partner" id="gemeinde31952"&gt;&lt;field name="member_of_city_alliance"&gt;True&lt;/field&gt;&lt;/record&gt;</text:p>
          </table:table-cell>
          <table:table-cell/>
          <table:table-cell office:value-type="string" calcext:value-type="string">
            <text:p>Purkersdorf</text:p>
          </table:table-cell>
          <table:table-cell office:value-type="float" office:value="31952" calcext:value-type="float">
            <text:p>3195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6]" office:value-type="float" office:value="31951" calcext:value-type="float">
            <text:p>3195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6];[.B136];[.C136])" office:value-type="string" office:string-value="&lt;record model=&quot;res.partner&quot; id=&quot;gemeinde31951&quot;&gt;&lt;field name=&quot;member_of_city_alliance&quot;&gt;True&lt;/field&gt;&lt;/record&gt;" calcext:value-type="string">
            <text:p>&lt;record model="res.partner" id="gemeinde31951"&gt;&lt;field name="member_of_city_alliance"&gt;True&lt;/field&gt;&lt;/record&gt;</text:p>
          </table:table-cell>
          <table:table-cell/>
          <table:table-cell office:value-type="string" calcext:value-type="string">
            <text:p>Pressbaum</text:p>
          </table:table-cell>
          <table:table-cell office:value-type="float" office:value="31951" calcext:value-type="float">
            <text:p>3195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7]" office:value-type="float" office:value="31947" calcext:value-type="float">
            <text:p>3194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7];[.B137];[.C137])" office:value-type="string" office:string-value="&lt;record model=&quot;res.partner&quot; id=&quot;gemeinde31947&quot;&gt;&lt;field name=&quot;member_of_city_alliance&quot;&gt;True&lt;/field&gt;&lt;/record&gt;" calcext:value-type="string">
            <text:p>&lt;record model="res.partner" id="gemeinde31947"&gt;&lt;field name="member_of_city_alliance"&gt;True&lt;/field&gt;&lt;/record&gt;</text:p>
          </table:table-cell>
          <table:table-cell/>
          <table:table-cell office:value-type="string" calcext:value-type="string">
            <text:p>Wilhelmsburg</text:p>
          </table:table-cell>
          <table:table-cell office:value-type="float" office:value="31947" calcext:value-type="float">
            <text:p>3194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8]" office:value-type="float" office:value="31943" calcext:value-type="float">
            <text:p>3194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8];[.B138];[.C138])" office:value-type="string" office:string-value="&lt;record model=&quot;res.partner&quot; id=&quot;gemeinde31943&quot;&gt;&lt;field name=&quot;member_of_city_alliance&quot;&gt;True&lt;/field&gt;&lt;/record&gt;" calcext:value-type="string">
            <text:p>&lt;record model="res.partner" id="gemeinde31943"&gt;&lt;field name="member_of_city_alliance"&gt;True&lt;/field&gt;&lt;/record&gt;</text:p>
          </table:table-cell>
          <table:table-cell/>
          <table:table-cell office:value-type="string" calcext:value-type="string">
            <text:p>Traismauer</text:p>
          </table:table-cell>
          <table:table-cell office:value-type="float" office:value="31943" calcext:value-type="float">
            <text:p>3194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39]" office:value-type="float" office:value="31929" calcext:value-type="float">
            <text:p>3192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39];[.B139];[.C139])" office:value-type="string" office:string-value="&lt;record model=&quot;res.partner&quot; id=&quot;gemeinde31929&quot;&gt;&lt;field name=&quot;member_of_city_alliance&quot;&gt;True&lt;/field&gt;&lt;/record&gt;" calcext:value-type="string">
            <text:p>&lt;record model="res.partner" id="gemeinde31929"&gt;&lt;field name="member_of_city_alliance"&gt;True&lt;/field&gt;&lt;/record&gt;</text:p>
          </table:table-cell>
          <table:table-cell/>
          <table:table-cell office:value-type="string" calcext:value-type="string">
            <text:p>Ober-Grafendorf</text:p>
          </table:table-cell>
          <table:table-cell office:value-type="float" office:value="31929" calcext:value-type="float">
            <text:p>3192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0]" office:value-type="float" office:value="31926" calcext:value-type="float">
            <text:p>3192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0];[.B140];[.C140])" office:value-type="string" office:string-value="&lt;record model=&quot;res.partner&quot; id=&quot;gemeinde31926&quot;&gt;&lt;field name=&quot;member_of_city_alliance&quot;&gt;True&lt;/field&gt;&lt;/record&gt;" calcext:value-type="string">
            <text:p>&lt;record model="res.partner" id="gemeinde31926"&gt;&lt;field name="member_of_city_alliance"&gt;True&lt;/field&gt;&lt;/record&gt;</text:p>
          </table:table-cell>
          <table:table-cell/>
          <table:table-cell office:value-type="string" calcext:value-type="string">
            <text:p>Neulengbach</text:p>
          </table:table-cell>
          <table:table-cell office:value-type="float" office:value="31926" calcext:value-type="float">
            <text:p>3192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1]" office:value-type="float" office:value="31912" calcext:value-type="float">
            <text:p>3191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1];[.B141];[.C141])" office:value-type="string" office:string-value="&lt;record model=&quot;res.partner&quot; id=&quot;gemeinde31912&quot;&gt;&lt;field name=&quot;member_of_city_alliance&quot;&gt;True&lt;/field&gt;&lt;/record&gt;" calcext:value-type="string">
            <text:p>&lt;record model="res.partner" id="gemeinde31912"&gt;&lt;field name="member_of_city_alliance"&gt;True&lt;/field&gt;&lt;/record&gt;</text:p>
          </table:table-cell>
          <table:table-cell/>
          <table:table-cell office:value-type="string" calcext:value-type="string">
            <text:p>Herzogenburg</text:p>
          </table:table-cell>
          <table:table-cell office:value-type="float" office:value="31912" calcext:value-type="float">
            <text:p>3191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2]" office:value-type="float" office:value="31839" calcext:value-type="float">
            <text:p>3183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2];[.B142];[.C142])" office:value-type="string" office:string-value="&lt;record model=&quot;res.partner&quot; id=&quot;gemeinde31839&quot;&gt;&lt;field name=&quot;member_of_city_alliance&quot;&gt;True&lt;/field&gt;&lt;/record&gt;" calcext:value-type="string">
            <text:p>&lt;record model="res.partner" id="gemeinde31839"&gt;&lt;field name="member_of_city_alliance"&gt;True&lt;/field&gt;&lt;/record&gt;</text:p>
          </table:table-cell>
          <table:table-cell/>
          <table:table-cell office:value-type="string" calcext:value-type="string">
            <text:p>Ternitz</text:p>
          </table:table-cell>
          <table:table-cell office:value-type="float" office:value="31839" calcext:value-type="float">
            <text:p>3183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3]" office:value-type="float" office:value="31838" calcext:value-type="float">
            <text:p>3183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3];[.B143];[.C143])" office:value-type="string" office:string-value="&lt;record model=&quot;res.partner&quot; id=&quot;gemeinde31838&quot;&gt;&lt;field name=&quot;member_of_city_alliance&quot;&gt;True&lt;/field&gt;&lt;/record&gt;" calcext:value-type="string">
            <text:p>&lt;record model="res.partner" id="gemeinde31838"&gt;&lt;field name="member_of_city_alliance"&gt;True&lt;/field&gt;&lt;/record&gt;</text:p>
          </table:table-cell>
          <table:table-cell/>
          <table:table-cell office:value-type="string" calcext:value-type="string">
            <text:p>Semmering</text:p>
          </table:table-cell>
          <table:table-cell office:value-type="float" office:value="31838" calcext:value-type="float">
            <text:p>3183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4]" office:value-type="float" office:value="31829" calcext:value-type="float">
            <text:p>3182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4];[.B144];[.C144])" office:value-type="string" office:string-value="&lt;record model=&quot;res.partner&quot; id=&quot;gemeinde31829&quot;&gt;&lt;field name=&quot;member_of_city_alliance&quot;&gt;True&lt;/field&gt;&lt;/record&gt;" calcext:value-type="string">
            <text:p>&lt;record model="res.partner" id="gemeinde31829"&gt;&lt;field name="member_of_city_alliance"&gt;True&lt;/field&gt;&lt;/record&gt;</text:p>
          </table:table-cell>
          <table:table-cell/>
          <table:table-cell office:value-type="string" calcext:value-type="string">
            <text:p>Reichenau an der Rax</text:p>
          </table:table-cell>
          <table:table-cell office:value-type="float" office:value="31829" calcext:value-type="float">
            <text:p>3182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5]" office:value-type="float" office:value="31826" calcext:value-type="float">
            <text:p>3182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5];[.B145];[.C145])" office:value-type="string" office:string-value="&lt;record model=&quot;res.partner&quot; id=&quot;gemeinde31826&quot;&gt;&lt;field name=&quot;member_of_city_alliance&quot;&gt;True&lt;/field&gt;&lt;/record&gt;" calcext:value-type="string">
            <text:p>&lt;record model="res.partner" id="gemeinde31826"&gt;&lt;field name="member_of_city_alliance"&gt;True&lt;/field&gt;&lt;/record&gt;</text:p>
          </table:table-cell>
          <table:table-cell/>
          <table:table-cell office:value-type="string" calcext:value-type="string">
            <text:p>Puchberg am Schneeberg</text:p>
          </table:table-cell>
          <table:table-cell office:value-type="float" office:value="31826" calcext:value-type="float">
            <text:p>3182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6]" office:value-type="float" office:value="31821" calcext:value-type="float">
            <text:p>3182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6];[.B146];[.C146])" office:value-type="string" office:string-value="&lt;record model=&quot;res.partner&quot; id=&quot;gemeinde31821&quot;&gt;&lt;field name=&quot;member_of_city_alliance&quot;&gt;True&lt;/field&gt;&lt;/record&gt;" calcext:value-type="string">
            <text:p>&lt;record model="res.partner" id="gemeinde31821"&gt;&lt;field name="member_of_city_alliance"&gt;True&lt;/field&gt;&lt;/record&gt;</text:p>
          </table:table-cell>
          <table:table-cell/>
          <table:table-cell office:value-type="string" calcext:value-type="string">
            <text:p>Payerbach</text:p>
          </table:table-cell>
          <table:table-cell office:value-type="float" office:value="31821" calcext:value-type="float">
            <text:p>3182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7]" office:value-type="float" office:value="31818" calcext:value-type="float">
            <text:p>3181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7];[.B147];[.C147])" office:value-type="string" office:string-value="&lt;record model=&quot;res.partner&quot; id=&quot;gemeinde31818&quot;&gt;&lt;field name=&quot;member_of_city_alliance&quot;&gt;True&lt;/field&gt;&lt;/record&gt;" calcext:value-type="string">
            <text:p>&lt;record model="res.partner" id="gemeinde31818"&gt;&lt;field name="member_of_city_alliance"&gt;True&lt;/field&gt;&lt;/record&gt;</text:p>
          </table:table-cell>
          <table:table-cell/>
          <table:table-cell office:value-type="string" calcext:value-type="string">
            <text:p>Neunkirchen</text:p>
          </table:table-cell>
          <table:table-cell office:value-type="float" office:value="31818" calcext:value-type="float">
            <text:p>3181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8]" office:value-type="float" office:value="31810" calcext:value-type="float">
            <text:p>3181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8];[.B148];[.C148])" office:value-type="string" office:string-value="&lt;record model=&quot;res.partner&quot; id=&quot;gemeinde31810&quot;&gt;&lt;field name=&quot;member_of_city_alliance&quot;&gt;True&lt;/field&gt;&lt;/record&gt;" calcext:value-type="string">
            <text:p>&lt;record model="res.partner" id="gemeinde31810"&gt;&lt;field name="member_of_city_alliance"&gt;True&lt;/field&gt;&lt;/record&gt;</text:p>
          </table:table-cell>
          <table:table-cell/>
          <table:table-cell office:value-type="string" calcext:value-type="string">
            <text:p>Gloggnitz</text:p>
          </table:table-cell>
          <table:table-cell office:value-type="float" office:value="31810" calcext:value-type="float">
            <text:p>3181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49]" office:value-type="float" office:value="31725" calcext:value-type="float">
            <text:p>3172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49];[.B149];[.C149])" office:value-type="string" office:string-value="&lt;record model=&quot;res.partner&quot; id=&quot;gemeinde31725&quot;&gt;&lt;field name=&quot;member_of_city_alliance&quot;&gt;True&lt;/field&gt;&lt;/record&gt;" calcext:value-type="string">
            <text:p>&lt;record model="res.partner" id="gemeinde31725"&gt;&lt;field name="member_of_city_alliance"&gt;True&lt;/field&gt;&lt;/record&gt;</text:p>
          </table:table-cell>
          <table:table-cell/>
          <table:table-cell office:value-type="string" calcext:value-type="string">
            <text:p>Wiener Neudorf</text:p>
          </table:table-cell>
          <table:table-cell office:value-type="float" office:value="31725" calcext:value-type="float">
            <text:p>3172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0]" office:value-type="float" office:value="31723" calcext:value-type="float">
            <text:p>3172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0];[.B150];[.C150])" office:value-type="string" office:string-value="&lt;record model=&quot;res.partner&quot; id=&quot;gemeinde31723&quot;&gt;&lt;field name=&quot;member_of_city_alliance&quot;&gt;True&lt;/field&gt;&lt;/record&gt;" calcext:value-type="string">
            <text:p>&lt;record model="res.partner" id="gemeinde31723"&gt;&lt;field name="member_of_city_alliance"&gt;True&lt;/field&gt;&lt;/record&gt;</text:p>
          </table:table-cell>
          <table:table-cell/>
          <table:table-cell office:value-type="string" calcext:value-type="string">
            <text:p>Vösendorf</text:p>
          </table:table-cell>
          <table:table-cell office:value-type="float" office:value="31723" calcext:value-type="float">
            <text:p>3172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1]" office:value-type="float" office:value="31719" calcext:value-type="float">
            <text:p>3171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1];[.B151];[.C151])" office:value-type="string" office:string-value="&lt;record model=&quot;res.partner&quot; id=&quot;gemeinde31719&quot;&gt;&lt;field name=&quot;member_of_city_alliance&quot;&gt;True&lt;/field&gt;&lt;/record&gt;" calcext:value-type="string">
            <text:p>&lt;record model="res.partner" id="gemeinde31719"&gt;&lt;field name="member_of_city_alliance"&gt;True&lt;/field&gt;&lt;/record&gt;</text:p>
          </table:table-cell>
          <table:table-cell/>
          <table:table-cell office:value-type="string" calcext:value-type="string">
            <text:p>Perchtoldsdorf</text:p>
          </table:table-cell>
          <table:table-cell office:value-type="float" office:value="31719" calcext:value-type="float">
            <text:p>3171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2]" office:value-type="float" office:value="31717" calcext:value-type="float">
            <text:p>317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2];[.B152];[.C152])" office:value-type="string" office:string-value="&lt;record model=&quot;res.partner&quot; id=&quot;gemeinde31717&quot;&gt;&lt;field name=&quot;member_of_city_alliance&quot;&gt;True&lt;/field&gt;&lt;/record&gt;" calcext:value-type="string">
            <text:p>&lt;record model="res.partner" id="gemeinde31717"&gt;&lt;field name="member_of_city_alliance"&gt;True&lt;/field&gt;&lt;/record&gt;</text:p>
          </table:table-cell>
          <table:table-cell/>
          <table:table-cell office:value-type="string" calcext:value-type="string">
            <text:p>Mödling</text:p>
          </table:table-cell>
          <table:table-cell office:value-type="float" office:value="31717" calcext:value-type="float">
            <text:p>317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3]" office:value-type="float" office:value="31704" calcext:value-type="float">
            <text:p>317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3];[.B153];[.C153])" office:value-type="string" office:string-value="&lt;record model=&quot;res.partner&quot; id=&quot;gemeinde31704&quot;&gt;&lt;field name=&quot;member_of_city_alliance&quot;&gt;True&lt;/field&gt;&lt;/record&gt;" calcext:value-type="string">
            <text:p>&lt;record model="res.partner" id="gemeinde31704"&gt;&lt;field name="member_of_city_alliance"&gt;True&lt;/field&gt;&lt;/record&gt;</text:p>
          </table:table-cell>
          <table:table-cell/>
          <table:table-cell office:value-type="string" calcext:value-type="string">
            <text:p>Brunn am Gebirge</text:p>
          </table:table-cell>
          <table:table-cell office:value-type="float" office:value="31704" calcext:value-type="float">
            <text:p>317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4]" office:value-type="float" office:value="31629" calcext:value-type="float">
            <text:p>3162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4];[.B154];[.C154])" office:value-type="string" office:string-value="&lt;record model=&quot;res.partner&quot; id=&quot;gemeinde31629&quot;&gt;&lt;field name=&quot;member_of_city_alliance&quot;&gt;True&lt;/field&gt;&lt;/record&gt;" calcext:value-type="string">
            <text:p>&lt;record model="res.partner" id="gemeinde31629"&gt;&lt;field name="member_of_city_alliance"&gt;True&lt;/field&gt;&lt;/record&gt;</text:p>
          </table:table-cell>
          <table:table-cell/>
          <table:table-cell office:value-type="string" calcext:value-type="string">
            <text:p>Laa an der Thaya</text:p>
          </table:table-cell>
          <table:table-cell office:value-type="float" office:value="31629" calcext:value-type="float">
            <text:p>3162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5]" office:value-type="float" office:value="31549" calcext:value-type="float">
            <text:p>3154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5];[.B155];[.C155])" office:value-type="string" office:string-value="&lt;record model=&quot;res.partner&quot; id=&quot;gemeinde31549&quot;&gt;&lt;field name=&quot;member_of_city_alliance&quot;&gt;True&lt;/field&gt;&lt;/record&gt;" calcext:value-type="string">
            <text:p>&lt;record model="res.partner" id="gemeinde31549"&gt;&lt;field name="member_of_city_alliance"&gt;True&lt;/field&gt;&lt;/record&gt;</text:p>
          </table:table-cell>
          <table:table-cell/>
          <table:table-cell office:value-type="string" calcext:value-type="string">
            <text:p>Ybbs an der Donau</text:p>
          </table:table-cell>
          <table:table-cell office:value-type="float" office:value="31549" calcext:value-type="float">
            <text:p>3154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6]" office:value-type="float" office:value="31533" calcext:value-type="float">
            <text:p>3153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6];[.B156];[.C156])" office:value-type="string" office:string-value="&lt;record model=&quot;res.partner&quot; id=&quot;gemeinde31533&quot;&gt;&lt;field name=&quot;member_of_city_alliance&quot;&gt;True&lt;/field&gt;&lt;/record&gt;" calcext:value-type="string">
            <text:p>&lt;record model="res.partner" id="gemeinde31533"&gt;&lt;field name="member_of_city_alliance"&gt;True&lt;/field&gt;&lt;/record&gt;</text:p>
          </table:table-cell>
          <table:table-cell/>
          <table:table-cell office:value-type="string" calcext:value-type="string">
            <text:p>Pöchlarn</text:p>
          </table:table-cell>
          <table:table-cell office:value-type="float" office:value="31533" calcext:value-type="float">
            <text:p>3153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7]" office:value-type="float" office:value="31524" calcext:value-type="float">
            <text:p>3152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7];[.B157];[.C157])" office:value-type="string" office:string-value="&lt;record model=&quot;res.partner&quot; id=&quot;gemeinde31524&quot;&gt;&lt;field name=&quot;member_of_city_alliance&quot;&gt;True&lt;/field&gt;&lt;/record&gt;" calcext:value-type="string">
            <text:p>&lt;record model="res.partner" id="gemeinde31524"&gt;&lt;field name="member_of_city_alliance"&gt;True&lt;/field&gt;&lt;/record&gt;</text:p>
          </table:table-cell>
          <table:table-cell/>
          <table:table-cell office:value-type="string" calcext:value-type="string">
            <text:p>Melk</text:p>
          </table:table-cell>
          <table:table-cell office:value-type="float" office:value="31524" calcext:value-type="float">
            <text:p>3152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8]" office:value-type="float" office:value="31520" calcext:value-type="float">
            <text:p>3152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8];[.B158];[.C158])" office:value-type="string" office:string-value="&lt;record model=&quot;res.partner&quot; id=&quot;gemeinde31520&quot;&gt;&lt;field name=&quot;member_of_city_alliance&quot;&gt;True&lt;/field&gt;&lt;/record&gt;" calcext:value-type="string">
            <text:p>&lt;record model="res.partner" id="gemeinde31520"&gt;&lt;field name="member_of_city_alliance"&gt;True&lt;/field&gt;&lt;/record&gt;</text:p>
          </table:table-cell>
          <table:table-cell/>
          <table:table-cell office:value-type="string" calcext:value-type="string">
            <text:p>Loosdorf</text:p>
          </table:table-cell>
          <table:table-cell office:value-type="float" office:value="31520" calcext:value-type="float">
            <text:p>3152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59]" office:value-type="float" office:value="31413" calcext:value-type="float">
            <text:p>314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59];[.B159];[.C159])" office:value-type="string" office:string-value="&lt;record model=&quot;res.partner&quot; id=&quot;gemeinde31413&quot;&gt;&lt;field name=&quot;member_of_city_alliance&quot;&gt;True&lt;/field&gt;&lt;/record&gt;" calcext:value-type="string">
            <text:p>&lt;record model="res.partner" id="gemeinde31413"&gt;&lt;field name="member_of_city_alliance"&gt;True&lt;/field&gt;&lt;/record&gt;</text:p>
          </table:table-cell>
          <table:table-cell/>
          <table:table-cell office:value-type="string" calcext:value-type="string">
            <text:p>Traisen</text:p>
          </table:table-cell>
          <table:table-cell office:value-type="float" office:value="31413" calcext:value-type="float">
            <text:p>314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0]" office:value-type="float" office:value="31412" calcext:value-type="float">
            <text:p>3141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0];[.B160];[.C160])" office:value-type="string" office:string-value="&lt;record model=&quot;res.partner&quot; id=&quot;gemeinde31412&quot;&gt;&lt;field name=&quot;member_of_city_alliance&quot;&gt;True&lt;/field&gt;&lt;/record&gt;" calcext:value-type="string">
            <text:p>&lt;record model="res.partner" id="gemeinde31412"&gt;&lt;field name="member_of_city_alliance"&gt;True&lt;/field&gt;&lt;/record&gt;</text:p>
          </table:table-cell>
          <table:table-cell/>
          <table:table-cell office:value-type="string" calcext:value-type="string">
            <text:p>St. Veit an der Gölsen</text:p>
          </table:table-cell>
          <table:table-cell office:value-type="float" office:value="31412" calcext:value-type="float">
            <text:p>3141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1]" office:value-type="float" office:value="31411" calcext:value-type="float">
            <text:p>3141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1];[.B161];[.C161])" office:value-type="string" office:string-value="&lt;record model=&quot;res.partner&quot; id=&quot;gemeinde31411&quot;&gt;&lt;field name=&quot;member_of_city_alliance&quot;&gt;True&lt;/field&gt;&lt;/record&gt;" calcext:value-type="string">
            <text:p>&lt;record model="res.partner" id="gemeinde31411"&gt;&lt;field name="member_of_city_alliance"&gt;True&lt;/field&gt;&lt;/record&gt;</text:p>
          </table:table-cell>
          <table:table-cell/>
          <table:table-cell office:value-type="string" calcext:value-type="string">
            <text:p>St. Aegyd am Neuwalde</text:p>
          </table:table-cell>
          <table:table-cell office:value-type="float" office:value="31411" calcext:value-type="float">
            <text:p>3141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2]" office:value-type="float" office:value="31404" calcext:value-type="float">
            <text:p>314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2];[.B162];[.C162])" office:value-type="string" office:string-value="&lt;record model=&quot;res.partner&quot; id=&quot;gemeinde31404&quot;&gt;&lt;field name=&quot;member_of_city_alliance&quot;&gt;True&lt;/field&gt;&lt;/record&gt;" calcext:value-type="string">
            <text:p>&lt;record model="res.partner" id="gemeinde31404"&gt;&lt;field name="member_of_city_alliance"&gt;True&lt;/field&gt;&lt;/record&gt;</text:p>
          </table:table-cell>
          <table:table-cell/>
          <table:table-cell office:value-type="string" calcext:value-type="string">
            <text:p>Hohenberg</text:p>
          </table:table-cell>
          <table:table-cell office:value-type="float" office:value="31404" calcext:value-type="float">
            <text:p>314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3]" office:value-type="float" office:value="31403" calcext:value-type="float">
            <text:p>314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3];[.B163];[.C163])" office:value-type="string" office:string-value="&lt;record model=&quot;res.partner&quot; id=&quot;gemeinde31403&quot;&gt;&lt;field name=&quot;member_of_city_alliance&quot;&gt;True&lt;/field&gt;&lt;/record&gt;" calcext:value-type="string">
            <text:p>&lt;record model="res.partner" id="gemeinde31403"&gt;&lt;field name="member_of_city_alliance"&gt;True&lt;/field&gt;&lt;/record&gt;</text:p>
          </table:table-cell>
          <table:table-cell/>
          <table:table-cell office:value-type="string" calcext:value-type="string">
            <text:p>Hainfeld</text:p>
          </table:table-cell>
          <table:table-cell office:value-type="float" office:value="31403" calcext:value-type="float">
            <text:p>314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4]" office:value-type="float" office:value="31322" calcext:value-type="float">
            <text:p>3132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4];[.B164];[.C164])" office:value-type="string" office:string-value="&lt;record model=&quot;res.partner&quot; id=&quot;gemeinde31322&quot;&gt;&lt;field name=&quot;member_of_city_alliance&quot;&gt;True&lt;/field&gt;&lt;/record&gt;" calcext:value-type="string">
            <text:p>&lt;record model="res.partner" id="gemeinde31322"&gt;&lt;field name="member_of_city_alliance"&gt;True&lt;/field&gt;&lt;/record&gt;</text:p>
          </table:table-cell>
          <table:table-cell/>
          <table:table-cell office:value-type="string" calcext:value-type="string">
            <text:p>Langenlois</text:p>
          </table:table-cell>
          <table:table-cell office:value-type="float" office:value="31322" calcext:value-type="float">
            <text:p>3132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5]" office:value-type="float" office:value="31235" calcext:value-type="float">
            <text:p>3123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5];[.B165];[.C165])" office:value-type="string" office:string-value="&lt;record model=&quot;res.partner&quot; id=&quot;gemeinde31235&quot;&gt;&lt;field name=&quot;member_of_city_alliance&quot;&gt;True&lt;/field&gt;&lt;/record&gt;" calcext:value-type="string">
            <text:p>&lt;record model="res.partner" id="gemeinde31235"&gt;&lt;field name="member_of_city_alliance"&gt;True&lt;/field&gt;&lt;/record&gt;</text:p>
          </table:table-cell>
          <table:table-cell/>
          <table:table-cell office:value-type="string" calcext:value-type="string">
            <text:p>Gerasdorf bei Wien</text:p>
          </table:table-cell>
          <table:table-cell office:value-type="float" office:value="31235" calcext:value-type="float">
            <text:p>3123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6]" office:value-type="float" office:value="31230" calcext:value-type="float">
            <text:p>3123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6];[.B166];[.C166])" office:value-type="string" office:string-value="&lt;record model=&quot;res.partner&quot; id=&quot;gemeinde31230&quot;&gt;&lt;field name=&quot;member_of_city_alliance&quot;&gt;True&lt;/field&gt;&lt;/record&gt;" calcext:value-type="string">
            <text:p>&lt;record model="res.partner" id="gemeinde31230"&gt;&lt;field name="member_of_city_alliance"&gt;True&lt;/field&gt;&lt;/record&gt;</text:p>
          </table:table-cell>
          <table:table-cell/>
          <table:table-cell office:value-type="string" calcext:value-type="string">
            <text:p>Stockerau</text:p>
          </table:table-cell>
          <table:table-cell office:value-type="float" office:value="31230" calcext:value-type="float">
            <text:p>3123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7]" office:value-type="float" office:value="31214" calcext:value-type="float">
            <text:p>312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7];[.B167];[.C167])" office:value-type="string" office:string-value="&lt;record model=&quot;res.partner&quot; id=&quot;gemeinde31214&quot;&gt;&lt;field name=&quot;member_of_city_alliance&quot;&gt;True&lt;/field&gt;&lt;/record&gt;" calcext:value-type="string">
            <text:p>&lt;record model="res.partner" id="gemeinde31214"&gt;&lt;field name="member_of_city_alliance"&gt;True&lt;/field&gt;&lt;/record&gt;</text:p>
          </table:table-cell>
          <table:table-cell/>
          <table:table-cell office:value-type="string" calcext:value-type="string">
            <text:p>Langenzersdorf</text:p>
          </table:table-cell>
          <table:table-cell office:value-type="float" office:value="31214" calcext:value-type="float">
            <text:p>312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8]" office:value-type="float" office:value="31213" calcext:value-type="float">
            <text:p>312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8];[.B168];[.C168])" office:value-type="string" office:string-value="&lt;record model=&quot;res.partner&quot; id=&quot;gemeinde31213&quot;&gt;&lt;field name=&quot;member_of_city_alliance&quot;&gt;True&lt;/field&gt;&lt;/record&gt;" calcext:value-type="string">
            <text:p>&lt;record model="res.partner" id="gemeinde31213"&gt;&lt;field name="member_of_city_alliance"&gt;True&lt;/field&gt;&lt;/record&gt;</text:p>
          </table:table-cell>
          <table:table-cell/>
          <table:table-cell office:value-type="string" calcext:value-type="string">
            <text:p>Korneuburg</text:p>
          </table:table-cell>
          <table:table-cell office:value-type="float" office:value="31213" calcext:value-type="float">
            <text:p>312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69]" office:value-type="float" office:value="31109" calcext:value-type="float">
            <text:p>3110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69];[.B169];[.C169])" office:value-type="string" office:string-value="&lt;record model=&quot;res.partner&quot; id=&quot;gemeinde31109&quot;&gt;&lt;field name=&quot;member_of_city_alliance&quot;&gt;True&lt;/field&gt;&lt;/record&gt;" calcext:value-type="string">
            <text:p>&lt;record model="res.partner" id="gemeinde31109"&gt;&lt;field name="member_of_city_alliance"&gt;True&lt;/field&gt;&lt;/record&gt;</text:p>
          </table:table-cell>
          <table:table-cell/>
          <table:table-cell office:value-type="string" calcext:value-type="string">
            <text:p>Horn</text:p>
          </table:table-cell>
          <table:table-cell office:value-type="float" office:value="31109" calcext:value-type="float">
            <text:p>3110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0]" office:value-type="float" office:value="31106" calcext:value-type="float">
            <text:p>3110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0];[.B170];[.C170])" office:value-type="string" office:string-value="&lt;record model=&quot;res.partner&quot; id=&quot;gemeinde31106&quot;&gt;&lt;field name=&quot;member_of_city_alliance&quot;&gt;True&lt;/field&gt;&lt;/record&gt;" calcext:value-type="string">
            <text:p>&lt;record model="res.partner" id="gemeinde31106"&gt;&lt;field name="member_of_city_alliance"&gt;True&lt;/field&gt;&lt;/record&gt;</text:p>
          </table:table-cell>
          <table:table-cell/>
          <table:table-cell office:value-type="string" calcext:value-type="string">
            <text:p>Gars am Kamp</text:p>
          </table:table-cell>
          <table:table-cell office:value-type="float" office:value="31106" calcext:value-type="float">
            <text:p>3110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1]" office:value-type="float" office:value="31105" calcext:value-type="float">
            <text:p>311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1];[.B171];[.C171])" office:value-type="string" office:string-value="&lt;record model=&quot;res.partner&quot; id=&quot;gemeinde31105&quot;&gt;&lt;field name=&quot;member_of_city_alliance&quot;&gt;True&lt;/field&gt;&lt;/record&gt;" calcext:value-type="string">
            <text:p>&lt;record model="res.partner" id="gemeinde31105"&gt;&lt;field name="member_of_city_alliance"&gt;True&lt;/field&gt;&lt;/record&gt;</text:p>
          </table:table-cell>
          <table:table-cell/>
          <table:table-cell office:value-type="string" calcext:value-type="string">
            <text:p>Eggenburg</text:p>
          </table:table-cell>
          <table:table-cell office:value-type="float" office:value="31105" calcext:value-type="float">
            <text:p>311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2]" office:value-type="float" office:value="31037" calcext:value-type="float">
            <text:p>3103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2];[.B172];[.C172])" office:value-type="string" office:string-value="&lt;record model=&quot;res.partner&quot; id=&quot;gemeinde31037&quot;&gt;&lt;field name=&quot;member_of_city_alliance&quot;&gt;True&lt;/field&gt;&lt;/record&gt;" calcext:value-type="string">
            <text:p>&lt;record model="res.partner" id="gemeinde31037"&gt;&lt;field name="member_of_city_alliance"&gt;True&lt;/field&gt;&lt;/record&gt;</text:p>
          </table:table-cell>
          <table:table-cell/>
          <table:table-cell office:value-type="string" calcext:value-type="string">
            <text:p>Retz</text:p>
          </table:table-cell>
          <table:table-cell office:value-type="float" office:value="31037" calcext:value-type="float">
            <text:p>3103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3]" office:value-type="float" office:value="31022" calcext:value-type="float">
            <text:p>3102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3];[.B173];[.C173])" office:value-type="string" office:string-value="&lt;record model=&quot;res.partner&quot; id=&quot;gemeinde31022&quot;&gt;&lt;field name=&quot;member_of_city_alliance&quot;&gt;True&lt;/field&gt;&lt;/record&gt;" calcext:value-type="string">
            <text:p>&lt;record model="res.partner" id="gemeinde31022"&gt;&lt;field name="member_of_city_alliance"&gt;True&lt;/field&gt;&lt;/record&gt;</text:p>
          </table:table-cell>
          <table:table-cell/>
          <table:table-cell office:value-type="string" calcext:value-type="string">
            <text:p>Hollabrunn</text:p>
          </table:table-cell>
          <table:table-cell office:value-type="float" office:value="31022" calcext:value-type="float">
            <text:p>3102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4]" office:value-type="float" office:value="30942" calcext:value-type="float">
            <text:p>3094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4];[.B174];[.C174])" office:value-type="string" office:string-value="&lt;record model=&quot;res.partner&quot; id=&quot;gemeinde30942&quot;&gt;&lt;field name=&quot;member_of_city_alliance&quot;&gt;True&lt;/field&gt;&lt;/record&gt;" calcext:value-type="string">
            <text:p>&lt;record model="res.partner" id="gemeinde30942"&gt;&lt;field name="member_of_city_alliance"&gt;True&lt;/field&gt;&lt;/record&gt;</text:p>
          </table:table-cell>
          <table:table-cell/>
          <table:table-cell office:value-type="string" calcext:value-type="string">
            <text:p>Weitra</text:p>
          </table:table-cell>
          <table:table-cell office:value-type="float" office:value="30942" calcext:value-type="float">
            <text:p>3094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5]" office:value-type="float" office:value="30935" calcext:value-type="float">
            <text:p>3093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5];[.B175];[.C175])" office:value-type="string" office:string-value="&lt;record model=&quot;res.partner&quot; id=&quot;gemeinde30935&quot;&gt;&lt;field name=&quot;member_of_city_alliance&quot;&gt;True&lt;/field&gt;&lt;/record&gt;" calcext:value-type="string">
            <text:p>&lt;record model="res.partner" id="gemeinde30935"&gt;&lt;field name="member_of_city_alliance"&gt;True&lt;/field&gt;&lt;/record&gt;</text:p>
          </table:table-cell>
          <table:table-cell/>
          <table:table-cell office:value-type="string" calcext:value-type="string">
            <text:p>Schrems</text:p>
          </table:table-cell>
          <table:table-cell office:value-type="float" office:value="30935" calcext:value-type="float">
            <text:p>3093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6]" office:value-type="float" office:value="30925" calcext:value-type="float">
            <text:p>3092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6];[.B176];[.C176])" office:value-type="string" office:string-value="&lt;record model=&quot;res.partner&quot; id=&quot;gemeinde30925&quot;&gt;&lt;field name=&quot;member_of_city_alliance&quot;&gt;True&lt;/field&gt;&lt;/record&gt;" calcext:value-type="string">
            <text:p>&lt;record model="res.partner" id="gemeinde30925"&gt;&lt;field name="member_of_city_alliance"&gt;True&lt;/field&gt;&lt;/record&gt;</text:p>
          </table:table-cell>
          <table:table-cell/>
          <table:table-cell office:value-type="string" calcext:value-type="string">
            <text:p>Litschau</text:p>
          </table:table-cell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7]" office:value-type="float" office:value="30916" calcext:value-type="float">
            <text:p>309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7];[.B177];[.C177])" office:value-type="string" office:string-value="&lt;record model=&quot;res.partner&quot; id=&quot;gemeinde30916&quot;&gt;&lt;field name=&quot;member_of_city_alliance&quot;&gt;True&lt;/field&gt;&lt;/record&gt;" calcext:value-type="string">
            <text:p>&lt;record model="res.partner" id="gemeinde30916"&gt;&lt;field name="member_of_city_alliance"&gt;True&lt;/field&gt;&lt;/record&gt;</text:p>
          </table:table-cell>
          <table:table-cell/>
          <table:table-cell office:value-type="string" calcext:value-type="string">
            <text:p>Heidenreichstein</text:p>
          </table:table-cell>
          <table:table-cell office:value-type="float" office:value="30916" calcext:value-type="float">
            <text:p>309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8]" office:value-type="float" office:value="30908" calcext:value-type="float">
            <text:p>309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8];[.B178];[.C178])" office:value-type="string" office:string-value="&lt;record model=&quot;res.partner&quot; id=&quot;gemeinde30908&quot;&gt;&lt;field name=&quot;member_of_city_alliance&quot;&gt;True&lt;/field&gt;&lt;/record&gt;" calcext:value-type="string">
            <text:p>&lt;record model="res.partner" id="gemeinde30908"&gt;&lt;field name="member_of_city_alliance"&gt;True&lt;/field&gt;&lt;/record&gt;</text:p>
          </table:table-cell>
          <table:table-cell/>
          <table:table-cell office:value-type="string" calcext:value-type="string">
            <text:p>Gmünd</text:p>
          </table:table-cell>
          <table:table-cell office:value-type="float" office:value="30908" calcext:value-type="float">
            <text:p>309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79]" office:value-type="float" office:value="30856" calcext:value-type="float">
            <text:p>3085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79];[.B179];[.C179])" office:value-type="string" office:string-value="&lt;record model=&quot;res.partner&quot; id=&quot;gemeinde30856&quot;&gt;&lt;field name=&quot;member_of_city_alliance&quot;&gt;True&lt;/field&gt;&lt;/record&gt;" calcext:value-type="string">
            <text:p>&lt;record model="res.partner" id="gemeinde30856"&gt;&lt;field name="member_of_city_alliance"&gt;True&lt;/field&gt;&lt;/record&gt;</text:p>
          </table:table-cell>
          <table:table-cell/>
          <table:table-cell office:value-type="string" calcext:value-type="string">
            <text:p>Strasshof an der Nordbahn</text:p>
          </table:table-cell>
          <table:table-cell office:value-type="float" office:value="30856" calcext:value-type="float">
            <text:p>3085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0]" office:value-type="float" office:value="30835" calcext:value-type="float">
            <text:p>3083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0];[.B180];[.C180])" office:value-type="string" office:string-value="&lt;record model=&quot;res.partner&quot; id=&quot;gemeinde30835&quot;&gt;&lt;field name=&quot;member_of_city_alliance&quot;&gt;True&lt;/field&gt;&lt;/record&gt;" calcext:value-type="string">
            <text:p>&lt;record model="res.partner" id="gemeinde30835"&gt;&lt;field name="member_of_city_alliance"&gt;True&lt;/field&gt;&lt;/record&gt;</text:p>
          </table:table-cell>
          <table:table-cell/>
          <table:table-cell office:value-type="string" calcext:value-type="string">
            <text:p>Marchegg</text:p>
          </table:table-cell>
          <table:table-cell office:value-type="float" office:value="30835" calcext:value-type="float">
            <text:p>3083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1]" office:value-type="float" office:value="30821" calcext:value-type="float">
            <text:p>3082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1];[.B181];[.C181])" office:value-type="string" office:string-value="&lt;record model=&quot;res.partner&quot; id=&quot;gemeinde30821&quot;&gt;&lt;field name=&quot;member_of_city_alliance&quot;&gt;True&lt;/field&gt;&lt;/record&gt;" calcext:value-type="string">
            <text:p>&lt;record model="res.partner" id="gemeinde30821"&gt;&lt;field name="member_of_city_alliance"&gt;True&lt;/field&gt;&lt;/record&gt;</text:p>
          </table:table-cell>
          <table:table-cell/>
          <table:table-cell office:value-type="string" calcext:value-type="string">
            <text:p>Groß-Enzersdorf</text:p>
          </table:table-cell>
          <table:table-cell office:value-type="float" office:value="30821" calcext:value-type="float">
            <text:p>3082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2]" office:value-type="float" office:value="30817" calcext:value-type="float">
            <text:p>308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2];[.B182];[.C182])" office:value-type="string" office:string-value="&lt;record model=&quot;res.partner&quot; id=&quot;gemeinde30817&quot;&gt;&lt;field name=&quot;member_of_city_alliance&quot;&gt;True&lt;/field&gt;&lt;/record&gt;" calcext:value-type="string">
            <text:p>&lt;record model="res.partner" id="gemeinde30817"&gt;&lt;field name="member_of_city_alliance"&gt;True&lt;/field&gt;&lt;/record&gt;</text:p>
          </table:table-cell>
          <table:table-cell/>
          <table:table-cell office:value-type="string" calcext:value-type="string">
            <text:p>Gänserndorf</text:p>
          </table:table-cell>
          <table:table-cell office:value-type="float" office:value="30817" calcext:value-type="float">
            <text:p>308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3]" office:value-type="float" office:value="30808" calcext:value-type="float">
            <text:p>308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3];[.B183];[.C183])" office:value-type="string" office:string-value="&lt;record model=&quot;res.partner&quot; id=&quot;gemeinde30808&quot;&gt;&lt;field name=&quot;member_of_city_alliance&quot;&gt;True&lt;/field&gt;&lt;/record&gt;" calcext:value-type="string">
            <text:p>&lt;record model="res.partner" id="gemeinde30808"&gt;&lt;field name="member_of_city_alliance"&gt;True&lt;/field&gt;&lt;/record&gt;</text:p>
          </table:table-cell>
          <table:table-cell/>
          <table:table-cell office:value-type="string" calcext:value-type="string">
            <text:p>Deutsch-Wagram</text:p>
          </table:table-cell>
          <table:table-cell office:value-type="float" office:value="30808" calcext:value-type="float">
            <text:p>308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4]" office:value-type="float" office:value="30740" calcext:value-type="float">
            <text:p>3074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4];[.B184];[.C184])" office:value-type="string" office:string-value="&lt;record model=&quot;res.partner&quot; id=&quot;gemeinde30740&quot;&gt;&lt;field name=&quot;member_of_city_alliance&quot;&gt;True&lt;/field&gt;&lt;/record&gt;" calcext:value-type="string">
            <text:p>&lt;record model="res.partner" id="gemeinde30740"&gt;&lt;field name="member_of_city_alliance"&gt;True&lt;/field&gt;&lt;/record&gt;</text:p>
          </table:table-cell>
          <table:table-cell/>
          <table:table-cell office:value-type="string" calcext:value-type="string">
            <text:p>Schwechat</text:p>
          </table:table-cell>
          <table:table-cell office:value-type="float" office:value="30740" calcext:value-type="float">
            <text:p>3074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5]" office:value-type="float" office:value="30739" calcext:value-type="float">
            <text:p>3073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5];[.B185];[.C185])" office:value-type="string" office:string-value="&lt;record model=&quot;res.partner&quot; id=&quot;gemeinde30739&quot;&gt;&lt;field name=&quot;member_of_city_alliance&quot;&gt;True&lt;/field&gt;&lt;/record&gt;" calcext:value-type="string">
            <text:p>&lt;record model="res.partner" id="gemeinde30739"&gt;&lt;field name="member_of_city_alliance"&gt;True&lt;/field&gt;&lt;/record&gt;</text:p>
          </table:table-cell>
          <table:table-cell/>
          <table:table-cell office:value-type="string" calcext:value-type="string">
            <text:p>Schwadorf</text:p>
          </table:table-cell>
          <table:table-cell office:value-type="float" office:value="30739" calcext:value-type="float">
            <text:p>3073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6]" office:value-type="float" office:value="30732" calcext:value-type="float">
            <text:p>3073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6];[.B186];[.C186])" office:value-type="string" office:string-value="&lt;record model=&quot;res.partner&quot; id=&quot;gemeinde30732&quot;&gt;&lt;field name=&quot;member_of_city_alliance&quot;&gt;True&lt;/field&gt;&lt;/record&gt;" calcext:value-type="string">
            <text:p>&lt;record model="res.partner" id="gemeinde30732"&gt;&lt;field name="member_of_city_alliance"&gt;True&lt;/field&gt;&lt;/record&gt;</text:p>
          </table:table-cell>
          <table:table-cell/>
          <table:table-cell office:value-type="string" calcext:value-type="string">
            <text:p>Himberg</text:p>
          </table:table-cell>
          <table:table-cell office:value-type="float" office:value="30732" calcext:value-type="float">
            <text:p>3073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7]" office:value-type="float" office:value="30731" calcext:value-type="float">
            <text:p>3073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7];[.B187];[.C187])" office:value-type="string" office:string-value="&lt;record model=&quot;res.partner&quot; id=&quot;gemeinde30731&quot;&gt;&lt;field name=&quot;member_of_city_alliance&quot;&gt;True&lt;/field&gt;&lt;/record&gt;" calcext:value-type="string">
            <text:p>&lt;record model="res.partner" id="gemeinde30731"&gt;&lt;field name="member_of_city_alliance"&gt;True&lt;/field&gt;&lt;/record&gt;</text:p>
          </table:table-cell>
          <table:table-cell/>
          <table:table-cell office:value-type="string" calcext:value-type="string">
            <text:p>Gramatneusiedl</text:p>
          </table:table-cell>
          <table:table-cell office:value-type="float" office:value="30731" calcext:value-type="float">
            <text:p>3073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8]" office:value-type="float" office:value="30730" calcext:value-type="float">
            <text:p>3073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8];[.B188];[.C188])" office:value-type="string" office:string-value="&lt;record model=&quot;res.partner&quot; id=&quot;gemeinde30730&quot;&gt;&lt;field name=&quot;member_of_city_alliance&quot;&gt;True&lt;/field&gt;&lt;/record&gt;" calcext:value-type="string">
            <text:p>&lt;record model="res.partner" id="gemeinde30730"&gt;&lt;field name="member_of_city_alliance"&gt;True&lt;/field&gt;&lt;/record&gt;</text:p>
          </table:table-cell>
          <table:table-cell/>
          <table:table-cell office:value-type="string" calcext:value-type="string">
            <text:p>Fischamend</text:p>
          </table:table-cell>
          <table:table-cell office:value-type="float" office:value="30730" calcext:value-type="float">
            <text:p>3073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89]" office:value-type="float" office:value="30716" calcext:value-type="float">
            <text:p>307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89];[.B189];[.C189])" office:value-type="string" office:string-value="&lt;record model=&quot;res.partner&quot; id=&quot;gemeinde30716&quot;&gt;&lt;field name=&quot;member_of_city_alliance&quot;&gt;True&lt;/field&gt;&lt;/record&gt;" calcext:value-type="string">
            <text:p>&lt;record model="res.partner" id="gemeinde30716"&gt;&lt;field name="member_of_city_alliance"&gt;True&lt;/field&gt;&lt;/record&gt;</text:p>
          </table:table-cell>
          <table:table-cell/>
          <table:table-cell office:value-type="string" calcext:value-type="string">
            <text:p>Mannersdorf am Leithagebirge</text:p>
          </table:table-cell>
          <table:table-cell office:value-type="float" office:value="30716" calcext:value-type="float">
            <text:p>307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0]" office:value-type="float" office:value="30710" calcext:value-type="float">
            <text:p>3071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0];[.B190];[.C190])" office:value-type="string" office:string-value="&lt;record model=&quot;res.partner&quot; id=&quot;gemeinde30710&quot;&gt;&lt;field name=&quot;member_of_city_alliance&quot;&gt;True&lt;/field&gt;&lt;/record&gt;" calcext:value-type="string">
            <text:p>&lt;record model="res.partner" id="gemeinde30710"&gt;&lt;field name="member_of_city_alliance"&gt;True&lt;/field&gt;&lt;/record&gt;</text:p>
          </table:table-cell>
          <table:table-cell/>
          <table:table-cell office:value-type="string" calcext:value-type="string">
            <text:p>Hainburg a.d. Donau</text:p>
          </table:table-cell>
          <table:table-cell office:value-type="float" office:value="30710" calcext:value-type="float">
            <text:p>3071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1]" office:value-type="float" office:value="30641" calcext:value-type="float">
            <text:p>3064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1];[.B191];[.C191])" office:value-type="string" office:string-value="&lt;record model=&quot;res.partner&quot; id=&quot;gemeinde30641&quot;&gt;&lt;field name=&quot;member_of_city_alliance&quot;&gt;True&lt;/field&gt;&lt;/record&gt;" calcext:value-type="string">
            <text:p>&lt;record model="res.partner" id="gemeinde30641"&gt;&lt;field name="member_of_city_alliance"&gt;True&lt;/field&gt;&lt;/record&gt;</text:p>
          </table:table-cell>
          <table:table-cell/>
          <table:table-cell office:value-type="string" calcext:value-type="string">
            <text:p>Trumau</text:p>
          </table:table-cell>
          <table:table-cell office:value-type="float" office:value="30641" calcext:value-type="float">
            <text:p>3064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2]" office:value-type="float" office:value="30639" calcext:value-type="float">
            <text:p>3063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2];[.B192];[.C192])" office:value-type="string" office:string-value="&lt;record model=&quot;res.partner&quot; id=&quot;gemeinde30639&quot;&gt;&lt;field name=&quot;member_of_city_alliance&quot;&gt;True&lt;/field&gt;&lt;/record&gt;" calcext:value-type="string">
            <text:p>&lt;record model="res.partner" id="gemeinde30639"&gt;&lt;field name="member_of_city_alliance"&gt;True&lt;/field&gt;&lt;/record&gt;</text:p>
          </table:table-cell>
          <table:table-cell/>
          <table:table-cell office:value-type="string" calcext:value-type="string">
            <text:p>Traiskirchen</text:p>
          </table:table-cell>
          <table:table-cell office:value-type="float" office:value="30639" calcext:value-type="float">
            <text:p>3063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3]" office:value-type="float" office:value="30631" calcext:value-type="float">
            <text:p>3063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3];[.B193];[.C193])" office:value-type="string" office:string-value="&lt;record model=&quot;res.partner&quot; id=&quot;gemeinde30631&quot;&gt;&lt;field name=&quot;member_of_city_alliance&quot;&gt;True&lt;/field&gt;&lt;/record&gt;" calcext:value-type="string">
            <text:p>&lt;record model="res.partner" id="gemeinde30631"&gt;&lt;field name="member_of_city_alliance"&gt;True&lt;/field&gt;&lt;/record&gt;</text:p>
          </table:table-cell>
          <table:table-cell/>
          <table:table-cell office:value-type="string" calcext:value-type="string">
            <text:p>Schönau an der Triesting</text:p>
          </table:table-cell>
          <table:table-cell office:value-type="float" office:value="30631" calcext:value-type="float">
            <text:p>3063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4]" office:value-type="float" office:value="30620" calcext:value-type="float">
            <text:p>3062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4];[.B194];[.C194])" office:value-type="string" office:string-value="&lt;record model=&quot;res.partner&quot; id=&quot;gemeinde30620&quot;&gt;&lt;field name=&quot;member_of_city_alliance&quot;&gt;True&lt;/field&gt;&lt;/record&gt;" calcext:value-type="string">
            <text:p>&lt;record model="res.partner" id="gemeinde30620"&gt;&lt;field name="member_of_city_alliance"&gt;True&lt;/field&gt;&lt;/record&gt;</text:p>
          </table:table-cell>
          <table:table-cell/>
          <table:table-cell office:value-type="string" calcext:value-type="string">
            <text:p>Leobersdorf</text:p>
          </table:table-cell>
          <table:table-cell office:value-type="float" office:value="30620" calcext:value-type="float">
            <text:p>3062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5]" office:value-type="float" office:value="30615" calcext:value-type="float">
            <text:p>3061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5];[.B195];[.C195])" office:value-type="string" office:string-value="&lt;record model=&quot;res.partner&quot; id=&quot;gemeinde30615&quot;&gt;&lt;field name=&quot;member_of_city_alliance&quot;&gt;True&lt;/field&gt;&lt;/record&gt;" calcext:value-type="string">
            <text:p>&lt;record model="res.partner" id="gemeinde30615"&gt;&lt;field name="member_of_city_alliance"&gt;True&lt;/field&gt;&lt;/record&gt;</text:p>
          </table:table-cell>
          <table:table-cell/>
          <table:table-cell office:value-type="string" calcext:value-type="string">
            <text:p>Hirtenberg</text:p>
          </table:table-cell>
          <table:table-cell office:value-type="float" office:value="30615" calcext:value-type="float">
            <text:p>3061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6]" office:value-type="float" office:value="30608" calcext:value-type="float">
            <text:p>3060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6];[.B196];[.C196])" office:value-type="string" office:string-value="&lt;record model=&quot;res.partner&quot; id=&quot;gemeinde30608&quot;&gt;&lt;field name=&quot;member_of_city_alliance&quot;&gt;True&lt;/field&gt;&lt;/record&gt;" calcext:value-type="string">
            <text:p>&lt;record model="res.partner" id="gemeinde30608"&gt;&lt;field name="member_of_city_alliance"&gt;True&lt;/field&gt;&lt;/record&gt;</text:p>
          </table:table-cell>
          <table:table-cell/>
          <table:table-cell office:value-type="string" calcext:value-type="string">
            <text:p>Enzesfeld-Lindabrunn</text:p>
          </table:table-cell>
          <table:table-cell office:value-type="float" office:value="30608" calcext:value-type="float">
            <text:p>3060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7]" office:value-type="float" office:value="30607" calcext:value-type="float">
            <text:p>306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7];[.B197];[.C197])" office:value-type="string" office:string-value="&lt;record model=&quot;res.partner&quot; id=&quot;gemeinde30607&quot;&gt;&lt;field name=&quot;member_of_city_alliance&quot;&gt;True&lt;/field&gt;&lt;/record&gt;" calcext:value-type="string">
            <text:p>&lt;record model="res.partner" id="gemeinde30607"&gt;&lt;field name="member_of_city_alliance"&gt;True&lt;/field&gt;&lt;/record&gt;</text:p>
          </table:table-cell>
          <table:table-cell/>
          <table:table-cell office:value-type="string" calcext:value-type="string">
            <text:p>Ebreichsdorf</text:p>
          </table:table-cell>
          <table:table-cell office:value-type="float" office:value="30607" calcext:value-type="float">
            <text:p>306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8]" office:value-type="float" office:value="30605" calcext:value-type="float">
            <text:p>306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8];[.B198];[.C198])" office:value-type="string" office:string-value="&lt;record model=&quot;res.partner&quot; id=&quot;gemeinde30605&quot;&gt;&lt;field name=&quot;member_of_city_alliance&quot;&gt;True&lt;/field&gt;&lt;/record&gt;" calcext:value-type="string">
            <text:p>&lt;record model="res.partner" id="gemeinde30605"&gt;&lt;field name="member_of_city_alliance"&gt;True&lt;/field&gt;&lt;/record&gt;</text:p>
          </table:table-cell>
          <table:table-cell/>
          <table:table-cell office:value-type="string" calcext:value-type="string">
            <text:p>Berndorf</text:p>
          </table:table-cell>
          <table:table-cell office:value-type="float" office:value="30605" calcext:value-type="float">
            <text:p>306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199]" office:value-type="float" office:value="30603" calcext:value-type="float">
            <text:p>306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199];[.B199];[.C199])" office:value-type="string" office:string-value="&lt;record model=&quot;res.partner&quot; id=&quot;gemeinde30603&quot;&gt;&lt;field name=&quot;member_of_city_alliance&quot;&gt;True&lt;/field&gt;&lt;/record&gt;" calcext:value-type="string">
            <text:p>&lt;record model="res.partner" id="gemeinde30603"&gt;&lt;field name="member_of_city_alliance"&gt;True&lt;/field&gt;&lt;/record&gt;</text:p>
          </table:table-cell>
          <table:table-cell/>
          <table:table-cell office:value-type="string" calcext:value-type="string">
            <text:p>Bad Vöslau</text:p>
          </table:table-cell>
          <table:table-cell office:value-type="float" office:value="30603" calcext:value-type="float">
            <text:p>306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0]" office:value-type="float" office:value="30531" calcext:value-type="float">
            <text:p>3053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0];[.B200];[.C200])" office:value-type="string" office:string-value="&lt;record model=&quot;res.partner&quot; id=&quot;gemeinde30531&quot;&gt;&lt;field name=&quot;member_of_city_alliance&quot;&gt;True&lt;/field&gt;&lt;/record&gt;" calcext:value-type="string">
            <text:p>&lt;record model="res.partner" id="gemeinde30531"&gt;&lt;field name="member_of_city_alliance"&gt;True&lt;/field&gt;&lt;/record&gt;</text:p>
          </table:table-cell>
          <table:table-cell/>
          <table:table-cell office:value-type="string" calcext:value-type="string">
            <text:p>St. Valentin</text:p>
          </table:table-cell>
          <table:table-cell office:value-type="float" office:value="30531" calcext:value-type="float">
            <text:p>3053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1]" office:value-type="float" office:value="30514" calcext:value-type="float">
            <text:p>3051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1];[.B201];[.C201])" office:value-type="string" office:string-value="&lt;record model=&quot;res.partner&quot; id=&quot;gemeinde30514&quot;&gt;&lt;field name=&quot;member_of_city_alliance&quot;&gt;True&lt;/field&gt;&lt;/record&gt;" calcext:value-type="string">
            <text:p>&lt;record model="res.partner" id="gemeinde30514"&gt;&lt;field name="member_of_city_alliance"&gt;True&lt;/field&gt;&lt;/record&gt;</text:p>
          </table:table-cell>
          <table:table-cell/>
          <table:table-cell office:value-type="string" calcext:value-type="string">
            <text:p>Haag</text:p>
          </table:table-cell>
          <table:table-cell office:value-type="float" office:value="30514" calcext:value-type="float">
            <text:p>3051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2]" office:value-type="float" office:value="30502" calcext:value-type="float">
            <text:p>305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2];[.B202];[.C202])" office:value-type="string" office:string-value="&lt;record model=&quot;res.partner&quot; id=&quot;gemeinde30502&quot;&gt;&lt;field name=&quot;member_of_city_alliance&quot;&gt;True&lt;/field&gt;&lt;/record&gt;" calcext:value-type="string">
            <text:p>&lt;record model="res.partner" id="gemeinde30502"&gt;&lt;field name="member_of_city_alliance"&gt;True&lt;/field&gt;&lt;/record&gt;</text:p>
          </table:table-cell>
          <table:table-cell/>
          <table:table-cell office:value-type="string" calcext:value-type="string">
            <text:p>Amstetten</text:p>
          </table:table-cell>
          <table:table-cell office:value-type="float" office:value="30502" calcext:value-type="float">
            <text:p>305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3]" office:value-type="float" office:value="30401" calcext:value-type="float">
            <text:p>304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3];[.B203];[.C203])" office:value-type="string" office:string-value="&lt;record model=&quot;res.partner&quot; id=&quot;gemeinde30401&quot;&gt;&lt;field name=&quot;member_of_city_alliance&quot;&gt;True&lt;/field&gt;&lt;/record&gt;" calcext:value-type="string">
            <text:p>&lt;record model="res.partner" id="gemeinde30401"&gt;&lt;field name="member_of_city_alliance"&gt;True&lt;/field&gt;&lt;/record&gt;</text:p>
          </table:table-cell>
          <table:table-cell/>
          <table:table-cell office:value-type="string" calcext:value-type="string">
            <text:p>Wiener Neustadt</text:p>
          </table:table-cell>
          <table:table-cell office:value-type="float" office:value="30401" calcext:value-type="float">
            <text:p>304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4]" office:value-type="float" office:value="30301" calcext:value-type="float">
            <text:p>303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4];[.B204];[.C204])" office:value-type="string" office:string-value="&lt;record model=&quot;res.partner&quot; id=&quot;gemeinde30301&quot;&gt;&lt;field name=&quot;member_of_city_alliance&quot;&gt;True&lt;/field&gt;&lt;/record&gt;" calcext:value-type="string">
            <text:p>&lt;record model="res.partner" id="gemeinde30301"&gt;&lt;field name="member_of_city_alliance"&gt;True&lt;/field&gt;&lt;/record&gt;</text:p>
          </table:table-cell>
          <table:table-cell/>
          <table:table-cell office:value-type="string" calcext:value-type="string">
            <text:p>Waidhofen an der Ybbs</text:p>
          </table:table-cell>
          <table:table-cell office:value-type="float" office:value="30301" calcext:value-type="float">
            <text:p>303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5]" office:value-type="float" office:value="30201" calcext:value-type="float">
            <text:p>302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5];[.B205];[.C205])" office:value-type="string" office:string-value="&lt;record model=&quot;res.partner&quot; id=&quot;gemeinde30201&quot;&gt;&lt;field name=&quot;member_of_city_alliance&quot;&gt;True&lt;/field&gt;&lt;/record&gt;" calcext:value-type="string">
            <text:p>&lt;record model="res.partner" id="gemeinde30201"&gt;&lt;field name="member_of_city_alliance"&gt;True&lt;/field&gt;&lt;/record&gt;</text:p>
          </table:table-cell>
          <table:table-cell/>
          <table:table-cell office:value-type="string" calcext:value-type="string">
            <text:p>St. Pölten</text:p>
          </table:table-cell>
          <table:table-cell office:value-type="float" office:value="30201" calcext:value-type="float">
            <text:p>302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6]" office:value-type="float" office:value="30101" calcext:value-type="float">
            <text:p>3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6];[.B206];[.C206])" office:value-type="string" office:string-value="&lt;record model=&quot;res.partner&quot; id=&quot;gemeinde30101&quot;&gt;&lt;field name=&quot;member_of_city_alliance&quot;&gt;True&lt;/field&gt;&lt;/record&gt;" calcext:value-type="string">
            <text:p>&lt;record model="res.partner" id="gemeinde30101"&gt;&lt;field name="member_of_city_alliance"&gt;True&lt;/field&gt;&lt;/record&gt;</text:p>
          </table:table-cell>
          <table:table-cell/>
          <table:table-cell office:value-type="string" calcext:value-type="string">
            <text:p>Krems an der Donau</text:p>
          </table:table-cell>
          <table:table-cell office:value-type="float" office:value="30101" calcext:value-type="float">
            <text:p>3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7]" office:value-type="float" office:value="21002" calcext:value-type="float">
            <text:p>210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7];[.B207];[.C207])" office:value-type="string" office:string-value="&lt;record model=&quot;res.partner&quot; id=&quot;gemeinde21002&quot;&gt;&lt;field name=&quot;member_of_city_alliance&quot;&gt;True&lt;/field&gt;&lt;/record&gt;" calcext:value-type="string">
            <text:p>&lt;record model="res.partner" id="gemeinde21002"&gt;&lt;field name="member_of_city_alliance"&gt;True&lt;/field&gt;&lt;/record&gt;</text:p>
          </table:table-cell>
          <table:table-cell/>
          <table:table-cell office:value-type="string" calcext:value-type="string">
            <text:p>Feldkirchen in Kärnten</text:p>
          </table:table-cell>
          <table:table-cell office:value-type="float" office:value="21002" calcext:value-type="float">
            <text:p>210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8]" office:value-type="float" office:value="20923" calcext:value-type="float">
            <text:p>2092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8];[.B208];[.C208])" office:value-type="string" office:string-value="&lt;record model=&quot;res.partner&quot; id=&quot;gemeinde20923&quot;&gt;&lt;field name=&quot;member_of_city_alliance&quot;&gt;True&lt;/field&gt;&lt;/record&gt;" calcext:value-type="string">
            <text:p>&lt;record model="res.partner" id="gemeinde20923"&gt;&lt;field name="member_of_city_alliance"&gt;True&lt;/field&gt;&lt;/record&gt;</text:p>
          </table:table-cell>
          <table:table-cell/>
          <table:table-cell office:value-type="string" calcext:value-type="string">
            <text:p>Wolfsberg</text:p>
          </table:table-cell>
          <table:table-cell office:value-type="float" office:value="20923" calcext:value-type="float">
            <text:p>2092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09]" office:value-type="float" office:value="20913" calcext:value-type="float">
            <text:p>209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09];[.B209];[.C209])" office:value-type="string" office:string-value="&lt;record model=&quot;res.partner&quot; id=&quot;gemeinde20913&quot;&gt;&lt;field name=&quot;member_of_city_alliance&quot;&gt;True&lt;/field&gt;&lt;/record&gt;" calcext:value-type="string">
            <text:p>&lt;record model="res.partner" id="gemeinde20913"&gt;&lt;field name="member_of_city_alliance"&gt;True&lt;/field&gt;&lt;/record&gt;</text:p>
          </table:table-cell>
          <table:table-cell/>
          <table:table-cell office:value-type="string" calcext:value-type="string">
            <text:p>St. Andrä</text:p>
          </table:table-cell>
          <table:table-cell office:value-type="float" office:value="20913" calcext:value-type="float">
            <text:p>209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0]" office:value-type="float" office:value="20817" calcext:value-type="float">
            <text:p>208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0];[.B210];[.C210])" office:value-type="string" office:string-value="&lt;record model=&quot;res.partner&quot; id=&quot;gemeinde20817&quot;&gt;&lt;field name=&quot;member_of_city_alliance&quot;&gt;True&lt;/field&gt;&lt;/record&gt;" calcext:value-type="string">
            <text:p>&lt;record model="res.partner" id="gemeinde20817"&gt;&lt;field name="member_of_city_alliance"&gt;True&lt;/field&gt;&lt;/record&gt;</text:p>
          </table:table-cell>
          <table:table-cell/>
          <table:table-cell office:value-type="string" calcext:value-type="string">
            <text:p>Völkermarkt</text:p>
          </table:table-cell>
          <table:table-cell office:value-type="float" office:value="20817" calcext:value-type="float">
            <text:p>208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1]" office:value-type="float" office:value="20803" calcext:value-type="float">
            <text:p>208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1];[.B211];[.C211])" office:value-type="string" office:string-value="&lt;record model=&quot;res.partner&quot; id=&quot;gemeinde20803&quot;&gt;&lt;field name=&quot;member_of_city_alliance&quot;&gt;True&lt;/field&gt;&lt;/record&gt;" calcext:value-type="string">
            <text:p>&lt;record model="res.partner" id="gemeinde20803"&gt;&lt;field name="member_of_city_alliance"&gt;True&lt;/field&gt;&lt;/record&gt;</text:p>
          </table:table-cell>
          <table:table-cell/>
          <table:table-cell office:value-type="string" calcext:value-type="string">
            <text:p>Eberndorf</text:p>
          </table:table-cell>
          <table:table-cell office:value-type="float" office:value="20803" calcext:value-type="float">
            <text:p>208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2]" office:value-type="float" office:value="20727" calcext:value-type="float">
            <text:p>2072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2];[.B212];[.C212])" office:value-type="string" office:string-value="&lt;record model=&quot;res.partner&quot; id=&quot;gemeinde20727&quot;&gt;&lt;field name=&quot;member_of_city_alliance&quot;&gt;True&lt;/field&gt;&lt;/record&gt;" calcext:value-type="string">
            <text:p>&lt;record model="res.partner" id="gemeinde20727"&gt;&lt;field name="member_of_city_alliance"&gt;True&lt;/field&gt;&lt;/record&gt;</text:p>
          </table:table-cell>
          <table:table-cell/>
          <table:table-cell office:value-type="string" calcext:value-type="string">
            <text:p>Wernberg</text:p>
          </table:table-cell>
          <table:table-cell office:value-type="float" office:value="20727" calcext:value-type="float">
            <text:p>2072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3]" office:value-type="float" office:value="20720" calcext:value-type="float">
            <text:p>2072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3];[.B213];[.C213])" office:value-type="string" office:string-value="&lt;record model=&quot;res.partner&quot; id=&quot;gemeinde20720&quot;&gt;&lt;field name=&quot;member_of_city_alliance&quot;&gt;True&lt;/field&gt;&lt;/record&gt;" calcext:value-type="string">
            <text:p>&lt;record model="res.partner" id="gemeinde20720"&gt;&lt;field name="member_of_city_alliance"&gt;True&lt;/field&gt;&lt;/record&gt;</text:p>
          </table:table-cell>
          <table:table-cell/>
          <table:table-cell office:value-type="string" calcext:value-type="string">
            <text:p>Paternion</text:p>
          </table:table-cell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4]" office:value-type="float" office:value="20702" calcext:value-type="float">
            <text:p>207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4];[.B214];[.C214])" office:value-type="string" office:string-value="&lt;record model=&quot;res.partner&quot; id=&quot;gemeinde20702&quot;&gt;&lt;field name=&quot;member_of_city_alliance&quot;&gt;True&lt;/field&gt;&lt;/record&gt;" calcext:value-type="string">
            <text:p>&lt;record model="res.partner" id="gemeinde20702"&gt;&lt;field name="member_of_city_alliance"&gt;True&lt;/field&gt;&lt;/record&gt;</text:p>
          </table:table-cell>
          <table:table-cell/>
          <table:table-cell office:value-type="string" calcext:value-type="string">
            <text:p>Arnoldstein</text:p>
          </table:table-cell>
          <table:table-cell office:value-type="float" office:value="20702" calcext:value-type="float">
            <text:p>207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5]" office:value-type="float" office:value="20635" calcext:value-type="float">
            <text:p>2063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5];[.B215];[.C215])" office:value-type="string" office:string-value="&lt;record model=&quot;res.partner&quot; id=&quot;gemeinde20635&quot;&gt;&lt;field name=&quot;member_of_city_alliance&quot;&gt;True&lt;/field&gt;&lt;/record&gt;" calcext:value-type="string">
            <text:p>&lt;record model="res.partner" id="gemeinde20635"&gt;&lt;field name="member_of_city_alliance"&gt;True&lt;/field&gt;&lt;/record&gt;</text:p>
          </table:table-cell>
          <table:table-cell/>
          <table:table-cell office:value-type="string" calcext:value-type="string">
            <text:p>Spittal an der Drau</text:p>
          </table:table-cell>
          <table:table-cell office:value-type="float" office:value="20635" calcext:value-type="float">
            <text:p>2063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6]" office:value-type="float" office:value="20630" calcext:value-type="float">
            <text:p>2063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6];[.B216];[.C216])" office:value-type="string" office:string-value="&lt;record model=&quot;res.partner&quot; id=&quot;gemeinde20630&quot;&gt;&lt;field name=&quot;member_of_city_alliance&quot;&gt;True&lt;/field&gt;&lt;/record&gt;" calcext:value-type="string">
            <text:p>&lt;record model="res.partner" id="gemeinde20630"&gt;&lt;field name="member_of_city_alliance"&gt;True&lt;/field&gt;&lt;/record&gt;</text:p>
          </table:table-cell>
          <table:table-cell/>
          <table:table-cell office:value-type="string" calcext:value-type="string">
            <text:p>Radenthein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7]" office:value-type="float" office:value="20527" calcext:value-type="float">
            <text:p>2052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7];[.B217];[.C217])" office:value-type="string" office:string-value="&lt;record model=&quot;res.partner&quot; id=&quot;gemeinde20527&quot;&gt;&lt;field name=&quot;member_of_city_alliance&quot;&gt;True&lt;/field&gt;&lt;/record&gt;" calcext:value-type="string">
            <text:p>&lt;record model="res.partner" id="gemeinde20527"&gt;&lt;field name="member_of_city_alliance"&gt;True&lt;/field&gt;&lt;/record&gt;</text:p>
          </table:table-cell>
          <table:table-cell/>
          <table:table-cell office:value-type="string" calcext:value-type="string">
            <text:p>St. Veit an der Glan</text:p>
          </table:table-cell>
          <table:table-cell office:value-type="float" office:value="20527" calcext:value-type="float">
            <text:p>2052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8]" office:value-type="float" office:value="20505" calcext:value-type="float">
            <text:p>205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8];[.B218];[.C218])" office:value-type="string" office:string-value="&lt;record model=&quot;res.partner&quot; id=&quot;gemeinde20505&quot;&gt;&lt;field name=&quot;member_of_city_alliance&quot;&gt;True&lt;/field&gt;&lt;/record&gt;" calcext:value-type="string">
            <text:p>&lt;record model="res.partner" id="gemeinde20505"&gt;&lt;field name="member_of_city_alliance"&gt;True&lt;/field&gt;&lt;/record&gt;</text:p>
          </table:table-cell>
          <table:table-cell/>
          <table:table-cell office:value-type="string" calcext:value-type="string">
            <text:p>Friesach</text:p>
          </table:table-cell>
          <table:table-cell office:value-type="float" office:value="20505" calcext:value-type="float">
            <text:p>205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19]" office:value-type="float" office:value="20421" calcext:value-type="float">
            <text:p>2042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19];[.B219];[.C219])" office:value-type="string" office:string-value="&lt;record model=&quot;res.partner&quot; id=&quot;gemeinde20421&quot;&gt;&lt;field name=&quot;member_of_city_alliance&quot;&gt;True&lt;/field&gt;&lt;/record&gt;" calcext:value-type="string">
            <text:p>&lt;record model="res.partner" id="gemeinde20421"&gt;&lt;field name="member_of_city_alliance"&gt;True&lt;/field&gt;&lt;/record&gt;</text:p>
          </table:table-cell>
          <table:table-cell/>
          <table:table-cell office:value-type="string" calcext:value-type="string">
            <text:p>Moosburg</text:p>
          </table:table-cell>
          <table:table-cell office:value-type="float" office:value="20421" calcext:value-type="float">
            <text:p>2042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0]" office:value-type="float" office:value="20415" calcext:value-type="float">
            <text:p>2041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0];[.B220];[.C220])" office:value-type="string" office:string-value="&lt;record model=&quot;res.partner&quot; id=&quot;gemeinde20415&quot;&gt;&lt;field name=&quot;member_of_city_alliance&quot;&gt;True&lt;/field&gt;&lt;/record&gt;" calcext:value-type="string">
            <text:p>&lt;record model="res.partner" id="gemeinde20415"&gt;&lt;field name="member_of_city_alliance"&gt;True&lt;/field&gt;&lt;/record&gt;</text:p>
          </table:table-cell>
          <table:table-cell/>
          <table:table-cell office:value-type="string" calcext:value-type="string">
            <text:p>Krumpendorf am Wörthersee</text:p>
          </table:table-cell>
          <table:table-cell office:value-type="float" office:value="20415" calcext:value-type="float">
            <text:p>2041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1]" office:value-type="float" office:value="20405" calcext:value-type="float">
            <text:p>204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1];[.B221];[.C221])" office:value-type="string" office:string-value="&lt;record model=&quot;res.partner&quot; id=&quot;gemeinde20405&quot;&gt;&lt;field name=&quot;member_of_city_alliance&quot;&gt;True&lt;/field&gt;&lt;/record&gt;" calcext:value-type="string">
            <text:p>&lt;record model="res.partner" id="gemeinde20405"&gt;&lt;field name="member_of_city_alliance"&gt;True&lt;/field&gt;&lt;/record&gt;</text:p>
          </table:table-cell>
          <table:table-cell/>
          <table:table-cell office:value-type="string" calcext:value-type="string">
            <text:p>Ferlach</text:p>
          </table:table-cell>
          <table:table-cell office:value-type="float" office:value="20405" calcext:value-type="float">
            <text:p>204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2]" office:value-type="float" office:value="20402" calcext:value-type="float">
            <text:p>204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2];[.B222];[.C222])" office:value-type="string" office:string-value="&lt;record model=&quot;res.partner&quot; id=&quot;gemeinde20402&quot;&gt;&lt;field name=&quot;member_of_city_alliance&quot;&gt;True&lt;/field&gt;&lt;/record&gt;" calcext:value-type="string">
            <text:p>&lt;record model="res.partner" id="gemeinde20402"&gt;&lt;field name="member_of_city_alliance"&gt;True&lt;/field&gt;&lt;/record&gt;</text:p>
          </table:table-cell>
          <table:table-cell/>
          <table:table-cell office:value-type="string" calcext:value-type="string">
            <text:p>Ebenthal in Kärnten</text:p>
          </table:table-cell>
          <table:table-cell office:value-type="float" office:value="20402" calcext:value-type="float">
            <text:p>204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3]" office:value-type="float" office:value="20201" calcext:value-type="float">
            <text:p>202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3];[.B223];[.C223])" office:value-type="string" office:string-value="&lt;record model=&quot;res.partner&quot; id=&quot;gemeinde20201&quot;&gt;&lt;field name=&quot;member_of_city_alliance&quot;&gt;True&lt;/field&gt;&lt;/record&gt;" calcext:value-type="string">
            <text:p>&lt;record model="res.partner" id="gemeinde20201"&gt;&lt;field name="member_of_city_alliance"&gt;True&lt;/field&gt;&lt;/record&gt;</text:p>
          </table:table-cell>
          <table:table-cell/>
          <table:table-cell office:value-type="string" calcext:value-type="string">
            <text:p>Villach</text:p>
          </table:table-cell>
          <table:table-cell office:value-type="float" office:value="20201" calcext:value-type="float">
            <text:p>202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4]" office:value-type="float" office:value="20101" calcext:value-type="float">
            <text:p>2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4];[.B224];[.C224])" office:value-type="string" office:string-value="&lt;record model=&quot;res.partner&quot; id=&quot;gemeinde20101&quot;&gt;&lt;field name=&quot;member_of_city_alliance&quot;&gt;True&lt;/field&gt;&lt;/record&gt;" calcext:value-type="string">
            <text:p>&lt;record model="res.partner" id="gemeinde20101"&gt;&lt;field name="member_of_city_alliance"&gt;True&lt;/field&gt;&lt;/record&gt;</text:p>
          </table:table-cell>
          <table:table-cell/>
          <table:table-cell office:value-type="string" calcext:value-type="string">
            <text:p>Klagenfurt am Wörthersee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5]" office:value-type="float" office:value="10923" calcext:value-type="float">
            <text:p>1092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5];[.B225];[.C225])" office:value-type="string" office:string-value="&lt;record model=&quot;res.partner&quot; id=&quot;gemeinde10923&quot;&gt;&lt;field name=&quot;member_of_city_alliance&quot;&gt;True&lt;/field&gt;&lt;/record&gt;" calcext:value-type="string">
            <text:p>&lt;record model="res.partner" id="gemeinde10923"&gt;&lt;field name="member_of_city_alliance"&gt;True&lt;/field&gt;&lt;/record&gt;</text:p>
          </table:table-cell>
          <table:table-cell/>
          <table:table-cell office:value-type="string" calcext:value-type="string">
            <text:p>Stadtschlaining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6]" office:value-type="float" office:value="10918" calcext:value-type="float">
            <text:p>1091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6];[.B226];[.C226])" office:value-type="string" office:string-value="&lt;record model=&quot;res.partner&quot; id=&quot;gemeinde10918&quot;&gt;&lt;field name=&quot;member_of_city_alliance&quot;&gt;True&lt;/field&gt;&lt;/record&gt;" calcext:value-type="string">
            <text:p>&lt;record model="res.partner" id="gemeinde10918"&gt;&lt;field name="member_of_city_alliance"&gt;True&lt;/field&gt;&lt;/record&gt;</text:p>
          </table:table-cell>
          <table:table-cell/>
          <table:table-cell office:value-type="string" calcext:value-type="string">
            <text:p>Pinkafeld</text:p>
          </table:table-cell>
          <table:table-cell office:value-type="float" office:value="10918" calcext:value-type="float">
            <text:p>1091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7]" office:value-type="float" office:value="10917" calcext:value-type="float">
            <text:p>1091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7];[.B227];[.C227])" office:value-type="string" office:string-value="&lt;record model=&quot;res.partner&quot; id=&quot;gemeinde10917&quot;&gt;&lt;field name=&quot;member_of_city_alliance&quot;&gt;True&lt;/field&gt;&lt;/record&gt;" calcext:value-type="string">
            <text:p>&lt;record model="res.partner" id="gemeinde10917"&gt;&lt;field name="member_of_city_alliance"&gt;True&lt;/field&gt;&lt;/record&gt;</text:p>
          </table:table-cell>
          <table:table-cell/>
          <table:table-cell office:value-type="string" calcext:value-type="string">
            <text:p>Oberwart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8]" office:value-type="float" office:value="10816" calcext:value-type="float">
            <text:p>1081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8];[.B228];[.C228])" office:value-type="string" office:string-value="&lt;record model=&quot;res.partner&quot; id=&quot;gemeinde10816&quot;&gt;&lt;field name=&quot;member_of_city_alliance&quot;&gt;True&lt;/field&gt;&lt;/record&gt;" calcext:value-type="string">
            <text:p>&lt;record model="res.partner" id="gemeinde10816"&gt;&lt;field name="member_of_city_alliance"&gt;True&lt;/field&gt;&lt;/record&gt;</text:p>
          </table:table-cell>
          <table:table-cell/>
          <table:table-cell office:value-type="string" calcext:value-type="string">
            <text:p>Oberpullendorf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29]" office:value-type="float" office:value="10713" calcext:value-type="float">
            <text:p>107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29];[.B229];[.C229])" office:value-type="string" office:string-value="&lt;record model=&quot;res.partner&quot; id=&quot;gemeinde10713&quot;&gt;&lt;field name=&quot;member_of_city_alliance&quot;&gt;True&lt;/field&gt;&lt;/record&gt;" calcext:value-type="string">
            <text:p>&lt;record model="res.partner" id="gemeinde10713"&gt;&lt;field name="member_of_city_alliance"&gt;True&lt;/field&gt;&lt;/record&gt;</text:p>
          </table:table-cell>
          <table:table-cell/>
          <table:table-cell office:value-type="string" calcext:value-type="string">
            <text:p>Neusiedl am See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0]" office:value-type="float" office:value="10705" calcext:value-type="float">
            <text:p>107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0];[.B230];[.C230])" office:value-type="string" office:string-value="&lt;record model=&quot;res.partner&quot; id=&quot;gemeinde10705&quot;&gt;&lt;field name=&quot;member_of_city_alliance&quot;&gt;True&lt;/field&gt;&lt;/record&gt;" calcext:value-type="string">
            <text:p>&lt;record model="res.partner" id="gemeinde10705"&gt;&lt;field name="member_of_city_alliance"&gt;True&lt;/field&gt;&lt;/record&gt;</text:p>
          </table:table-cell>
          <table:table-cell/>
          <table:table-cell office:value-type="string" calcext:value-type="string">
            <text:p>Frauenkirchen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1]" office:value-type="float" office:value="10703" calcext:value-type="float">
            <text:p>107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1];[.B231];[.C231])" office:value-type="string" office:string-value="&lt;record model=&quot;res.partner&quot; id=&quot;gemeinde10703&quot;&gt;&lt;field name=&quot;member_of_city_alliance&quot;&gt;True&lt;/field&gt;&lt;/record&gt;" calcext:value-type="string">
            <text:p>&lt;record model="res.partner" id="gemeinde10703"&gt;&lt;field name="member_of_city_alliance"&gt;True&lt;/field&gt;&lt;/record&gt;</text:p>
          </table:table-cell>
          <table:table-cell/>
          <table:table-cell office:value-type="string" calcext:value-type="string">
            <text:p>Bruckneudorf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2]" office:value-type="float" office:value="10701" calcext:value-type="float">
            <text:p>107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2];[.B232];[.C232])" office:value-type="string" office:string-value="&lt;record model=&quot;res.partner&quot; id=&quot;gemeinde10701&quot;&gt;&lt;field name=&quot;member_of_city_alliance&quot;&gt;True&lt;/field&gt;&lt;/record&gt;" calcext:value-type="string">
            <text:p>&lt;record model="res.partner" id="gemeinde10701"&gt;&lt;field name="member_of_city_alliance"&gt;True&lt;/field&gt;&lt;/record&gt;</text:p>
          </table:table-cell>
          <table:table-cell/>
          <table:table-cell office:value-type="string" calcext:value-type="string">
            <text:p>Andau</text:p>
          </table:table-cell>
          <table:table-cell office:value-type="float" office:value="10701" calcext:value-type="float">
            <text:p>107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3]" office:value-type="float" office:value="10607" calcext:value-type="float">
            <text:p>1060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3];[.B233];[.C233])" office:value-type="string" office:string-value="&lt;record model=&quot;res.partner&quot; id=&quot;gemeinde10607&quot;&gt;&lt;field name=&quot;member_of_city_alliance&quot;&gt;True&lt;/field&gt;&lt;/record&gt;" calcext:value-type="string">
            <text:p>&lt;record model="res.partner" id="gemeinde10607"&gt;&lt;field name="member_of_city_alliance"&gt;True&lt;/field&gt;&lt;/record&gt;</text:p>
          </table:table-cell>
          <table:table-cell/>
          <table:table-cell office:value-type="string" calcext:value-type="string">
            <text:p>Neudörfl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4]" office:value-type="float" office:value="10606" calcext:value-type="float">
            <text:p>1060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4];[.B234];[.C234])" office:value-type="string" office:string-value="&lt;record model=&quot;res.partner&quot; id=&quot;gemeinde10606&quot;&gt;&lt;field name=&quot;member_of_city_alliance&quot;&gt;True&lt;/field&gt;&lt;/record&gt;" calcext:value-type="string">
            <text:p>&lt;record model="res.partner" id="gemeinde10606"&gt;&lt;field name="member_of_city_alliance"&gt;True&lt;/field&gt;&lt;/record&gt;</text:p>
          </table:table-cell>
          <table:table-cell/>
          <table:table-cell office:value-type="string" calcext:value-type="string">
            <text:p>Mattersburg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5]" office:value-type="float" office:value="10504" calcext:value-type="float">
            <text:p>105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5];[.B235];[.C235])" office:value-type="string" office:string-value="&lt;record model=&quot;res.partner&quot; id=&quot;gemeinde10504&quot;&gt;&lt;field name=&quot;member_of_city_alliance&quot;&gt;True&lt;/field&gt;&lt;/record&gt;" calcext:value-type="string">
            <text:p>&lt;record model="res.partner" id="gemeinde10504"&gt;&lt;field name="member_of_city_alliance"&gt;True&lt;/field&gt;&lt;/record&gt;</text:p>
          </table:table-cell>
          <table:table-cell/>
          <table:table-cell office:value-type="string" calcext:value-type="string">
            <text:p>Jennersdorf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6]" office:value-type="float" office:value="10405" calcext:value-type="float">
            <text:p>104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6];[.B236];[.C236])" office:value-type="string" office:string-value="&lt;record model=&quot;res.partner&quot; id=&quot;gemeinde10405&quot;&gt;&lt;field name=&quot;member_of_city_alliance&quot;&gt;True&lt;/field&gt;&lt;/record&gt;" calcext:value-type="string">
            <text:p>&lt;record model="res.partner" id="gemeinde10405"&gt;&lt;field name="member_of_city_alliance"&gt;True&lt;/field&gt;&lt;/record&gt;</text:p>
          </table:table-cell>
          <table:table-cell/>
          <table:table-cell office:value-type="string" calcext:value-type="string">
            <text:p>Güssing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7]" office:value-type="float" office:value="10309" calcext:value-type="float">
            <text:p>1030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7];[.B237];[.C237])" office:value-type="string" office:string-value="&lt;record model=&quot;res.partner&quot; id=&quot;gemeinde10309&quot;&gt;&lt;field name=&quot;member_of_city_alliance&quot;&gt;True&lt;/field&gt;&lt;/record&gt;" calcext:value-type="string">
            <text:p>&lt;record model="res.partner" id="gemeinde10309"&gt;&lt;field name="member_of_city_alliance"&gt;True&lt;/field&gt;&lt;/record&gt;</text:p>
          </table:table-cell>
          <table:table-cell/>
          <table:table-cell office:value-type="string" calcext:value-type="string">
            <text:p>Neufeld an der Leitha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8]" office:value-type="float" office:value="10201" calcext:value-type="float">
            <text:p>102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8];[.B238];[.C238])" office:value-type="string" office:string-value="&lt;record model=&quot;res.partner&quot; id=&quot;gemeinde10201&quot;&gt;&lt;field name=&quot;member_of_city_alliance&quot;&gt;True&lt;/field&gt;&lt;/record&gt;" calcext:value-type="string">
            <text:p>&lt;record model="res.partner" id="gemeinde10201"&gt;&lt;field name="member_of_city_alliance"&gt;True&lt;/field&gt;&lt;/record&gt;</text:p>
          </table:table-cell>
          <table:table-cell/>
          <table:table-cell office:value-type="string" calcext:value-type="string">
            <text:p>Rust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39]" office:value-type="float" office:value="10101" calcext:value-type="float">
            <text:p>101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39];[.B239];[.C239])" office:value-type="string" office:string-value="&lt;record model=&quot;res.partner&quot; id=&quot;gemeinde10101&quot;&gt;&lt;field name=&quot;member_of_city_alliance&quot;&gt;True&lt;/field&gt;&lt;/record&gt;" calcext:value-type="string">
            <text:p>&lt;record model="res.partner" id="gemeinde10101"&gt;&lt;field name="member_of_city_alliance"&gt;True&lt;/field&gt;&lt;/record&gt;</text:p>
          </table:table-cell>
          <table:table-cell/>
          <table:table-cell office:value-type="string" calcext:value-type="string">
            <text:p>Eisenstadt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0]" office:value-type="float" office:value="20305" calcext:value-type="float">
            <text:p>203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0];[.B240];[.C240])" office:value-type="string" office:string-value="&lt;record model=&quot;res.partner&quot; id=&quot;gemeinde20305&quot;&gt;&lt;field name=&quot;member_of_city_alliance&quot;&gt;True&lt;/field&gt;&lt;/record&gt;" calcext:value-type="string">
            <text:p>&lt;record model="res.partner" id="gemeinde20305"&gt;&lt;field name="member_of_city_alliance"&gt;True&lt;/field&gt;&lt;/record&gt;</text:p>
          </table:table-cell>
          <table:table-cell/>
          <table:table-cell office:value-type="string" calcext:value-type="string">
            <text:p>Hermagor-Pressegger See</text:p>
          </table:table-cell>
          <table:table-cell office:value-type="float" office:value="20305" calcext:value-type="float">
            <text:p>203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1]" office:value-type="float" office:value="20725" calcext:value-type="float">
            <text:p>2072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1];[.B241];[.C241])" office:value-type="string" office:string-value="&lt;record model=&quot;res.partner&quot; id=&quot;gemeinde20725&quot;&gt;&lt;field name=&quot;member_of_city_alliance&quot;&gt;True&lt;/field&gt;&lt;/record&gt;" calcext:value-type="string">
            <text:p>&lt;record model="res.partner" id="gemeinde20725"&gt;&lt;field name="member_of_city_alliance"&gt;True&lt;/field&gt;&lt;/record&gt;</text:p>
          </table:table-cell>
          <table:table-cell/>
          <table:table-cell office:value-type="string" calcext:value-type="string">
            <text:p>Velden am Wörther See</text:p>
          </table:table-cell>
          <table:table-cell office:value-type="float" office:value="20725" calcext:value-type="float">
            <text:p>2072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2]" office:value-type="float" office:value="40702" calcext:value-type="float">
            <text:p>40702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2];[.B242];[.C242])" office:value-type="string" office:string-value="&lt;record model=&quot;res.partner&quot; id=&quot;gemeinde40702&quot;&gt;&lt;field name=&quot;member_of_city_alliance&quot;&gt;True&lt;/field&gt;&lt;/record&gt;" calcext:value-type="string">
            <text:p>&lt;record model="res.partner" id="gemeinde40702"&gt;&lt;field name="member_of_city_alliance"&gt;True&lt;/field&gt;&lt;/record&gt;</text:p>
          </table:table-cell>
          <table:table-cell/>
          <table:table-cell office:value-type="string" calcext:value-type="string">
            <text:p>Bad Goisern am Hallstättersee</text:p>
          </table:table-cell>
          <table:table-cell office:value-type="float" office:value="40702" calcext:value-type="float">
            <text:p>40702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3]" office:value-type="float" office:value="41606" calcext:value-type="float">
            <text:p>4160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3];[.B243];[.C243])" office:value-type="string" office:string-value="&lt;record model=&quot;res.partner&quot; id=&quot;gemeinde41606&quot;&gt;&lt;field name=&quot;member_of_city_alliance&quot;&gt;True&lt;/field&gt;&lt;/record&gt;" calcext:value-type="string">
            <text:p>&lt;record model="res.partner" id="gemeinde41606"&gt;&lt;field name="member_of_city_alliance"&gt;True&lt;/field&gt;&lt;/record&gt;</text:p>
          </table:table-cell>
          <table:table-cell/>
          <table:table-cell office:value-type="string" calcext:value-type="string">
            <text:p>Feldkirchen an der Donau</text:p>
          </table:table-cell>
          <table:table-cell office:value-type="float" office:value="41606" calcext:value-type="float">
            <text:p>4160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4]" office:value-type="float" office:value="40905" calcext:value-type="float">
            <text:p>409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4];[.B244];[.C244])" office:value-type="string" office:string-value="&lt;record model=&quot;res.partner&quot; id=&quot;gemeinde40905&quot;&gt;&lt;field name=&quot;member_of_city_alliance&quot;&gt;True&lt;/field&gt;&lt;/record&gt;" calcext:value-type="string">
            <text:p>&lt;record model="res.partner" id="gemeinde40905"&gt;&lt;field name="member_of_city_alliance"&gt;True&lt;/field&gt;&lt;/record&gt;</text:p>
          </table:table-cell>
          <table:table-cell/>
          <table:table-cell office:value-type="string" calcext:value-type="string">
            <text:p>Kirchdorf an der Krems</text:p>
          </table:table-cell>
          <table:table-cell office:value-type="float" office:value="40905" calcext:value-type="float">
            <text:p>409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5]" office:value-type="float" office:value="30604" calcext:value-type="float">
            <text:p>306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5];[.B245];[.C245])" office:value-type="string" office:string-value="&lt;record model=&quot;res.partner&quot; id=&quot;gemeinde30604&quot;&gt;&lt;field name=&quot;member_of_city_alliance&quot;&gt;True&lt;/field&gt;&lt;/record&gt;" calcext:value-type="string">
            <text:p>&lt;record model="res.partner" id="gemeinde30604"&gt;&lt;field name="member_of_city_alliance"&gt;True&lt;/field&gt;&lt;/record&gt;</text:p>
          </table:table-cell>
          <table:table-cell/>
          <table:table-cell office:value-type="string" calcext:value-type="string">
            <text:p>Baden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6]" office:value-type="float" office:value="30903" calcext:value-type="float">
            <text:p>3090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6];[.B246];[.C246])" office:value-type="string" office:string-value="&lt;record model=&quot;res.partner&quot; id=&quot;gemeinde30903&quot;&gt;&lt;field name=&quot;member_of_city_alliance&quot;&gt;True&lt;/field&gt;&lt;/record&gt;" calcext:value-type="string">
            <text:p>&lt;record model="res.partner" id="gemeinde30903"&gt;&lt;field name="member_of_city_alliance"&gt;True&lt;/field&gt;&lt;/record&gt;</text:p>
          </table:table-cell>
          <table:table-cell/>
          <table:table-cell office:value-type="string" calcext:value-type="string">
            <text:p>Brand-Nagelberg</text:p>
          </table:table-cell>
          <table:table-cell office:value-type="float" office:value="30903" calcext:value-type="float">
            <text:p>3090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7]" office:value-type="float" office:value="30704" calcext:value-type="float">
            <text:p>3070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7];[.B247];[.C247])" office:value-type="string" office:string-value="&lt;record model=&quot;res.partner&quot; id=&quot;gemeinde30704&quot;&gt;&lt;field name=&quot;member_of_city_alliance&quot;&gt;True&lt;/field&gt;&lt;/record&gt;" calcext:value-type="string">
            <text:p>&lt;record model="res.partner" id="gemeinde30704"&gt;&lt;field name="member_of_city_alliance"&gt;True&lt;/field&gt;&lt;/record&gt;</text:p>
          </table:table-cell>
          <table:table-cell/>
          <table:table-cell office:value-type="string" calcext:value-type="string">
            <text:p>Bruck an der Leitha</text:p>
          </table:table-cell>
          <table:table-cell office:value-type="float" office:value="30704" calcext:value-type="float">
            <text:p>3070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8]" office:value-type="float" office:value="31710" calcext:value-type="float">
            <text:p>3171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8];[.B248];[.C248])" office:value-type="string" office:string-value="&lt;record model=&quot;res.partner&quot; id=&quot;gemeinde31710&quot;&gt;&lt;field name=&quot;member_of_city_alliance&quot;&gt;True&lt;/field&gt;&lt;/record&gt;" calcext:value-type="string">
            <text:p>&lt;record model="res.partner" id="gemeinde31710"&gt;&lt;field name="member_of_city_alliance"&gt;True&lt;/field&gt;&lt;/record&gt;</text:p>
          </table:table-cell>
          <table:table-cell/>
          <table:table-cell office:value-type="string" calcext:value-type="string">
            <text:p>Guntramsdorf</text:p>
          </table:table-cell>
          <table:table-cell office:value-type="float" office:value="31710" calcext:value-type="float">
            <text:p>3171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49]" office:value-type="float" office:value="30706" calcext:value-type="float">
            <text:p>30706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49];[.B249];[.C249])" office:value-type="string" office:string-value="&lt;record model=&quot;res.partner&quot; id=&quot;gemeinde30706&quot;&gt;&lt;field name=&quot;member_of_city_alliance&quot;&gt;True&lt;/field&gt;&lt;/record&gt;" calcext:value-type="string">
            <text:p>&lt;record model="res.partner" id="gemeinde30706"&gt;&lt;field name="member_of_city_alliance"&gt;True&lt;/field&gt;&lt;/record&gt;</text:p>
          </table:table-cell>
          <table:table-cell/>
          <table:table-cell office:value-type="string" calcext:value-type="string">
            <text:p>Enzersdorf an der Fischa</text:p>
          </table:table-cell>
          <table:table-cell office:value-type="float" office:value="30706" calcext:value-type="float">
            <text:p>30706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0]" office:value-type="float" office:value="30827" calcext:value-type="float">
            <text:p>3082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0];[.B250];[.C250])" office:value-type="string" office:string-value="&lt;record model=&quot;res.partner&quot; id=&quot;gemeinde30827&quot;&gt;&lt;field name=&quot;member_of_city_alliance&quot;&gt;True&lt;/field&gt;&lt;/record&gt;" calcext:value-type="string">
            <text:p>&lt;record model="res.partner" id="gemeinde30827"&gt;&lt;field name="member_of_city_alliance"&gt;True&lt;/field&gt;&lt;/record&gt;</text:p>
          </table:table-cell>
          <table:table-cell/>
          <table:table-cell office:value-type="string" calcext:value-type="string">
            <text:p>Hohenau an der March</text:p>
          </table:table-cell>
          <table:table-cell office:value-type="float" office:value="30827" calcext:value-type="float">
            <text:p>3082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1]" office:value-type="float" office:value="31655" calcext:value-type="float">
            <text:p>3165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1];[.B251];[.C251])" office:value-type="string" office:string-value="&lt;record model=&quot;res.partner&quot; id=&quot;gemeinde31655&quot;&gt;&lt;field name=&quot;member_of_city_alliance&quot;&gt;True&lt;/field&gt;&lt;/record&gt;" calcext:value-type="string">
            <text:p>&lt;record model="res.partner" id="gemeinde31655"&gt;&lt;field name="member_of_city_alliance"&gt;True&lt;/field&gt;&lt;/record&gt;</text:p>
          </table:table-cell>
          <table:table-cell/>
          <table:table-cell office:value-type="string" calcext:value-type="string">
            <text:p>Wolkersdorf</text:p>
          </table:table-cell>
          <table:table-cell office:value-type="float" office:value="31655" calcext:value-type="float">
            <text:p>3165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2]" office:value-type="float" office:value="62105" calcext:value-type="float">
            <text:p>6210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2];[.B252];[.C252])" office:value-type="string" office:string-value="&lt;record model=&quot;res.partner&quot; id=&quot;gemeinde62105&quot;&gt;&lt;field name=&quot;member_of_city_alliance&quot;&gt;True&lt;/field&gt;&lt;/record&gt;" calcext:value-type="string">
            <text:p>&lt;record model="res.partner" id="gemeinde62105"&gt;&lt;field name="member_of_city_alliance"&gt;True&lt;/field&gt;&lt;/record&gt;</text:p>
          </table:table-cell>
          <table:table-cell/>
          <table:table-cell office:value-type="string" calcext:value-type="string">
            <text:p>Breitenau am Hochlantsch</text:p>
          </table:table-cell>
          <table:table-cell office:value-type="float" office:value="62105" calcext:value-type="float">
            <text:p>6210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3]" office:value-type="float" office:value="62139" calcext:value-type="float">
            <text:p>62139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3];[.B253];[.C253])" office:value-type="string" office:string-value="&lt;record model=&quot;res.partner&quot; id=&quot;gemeinde62139&quot;&gt;&lt;field name=&quot;member_of_city_alliance&quot;&gt;True&lt;/field&gt;&lt;/record&gt;" calcext:value-type="string">
            <text:p>&lt;record model="res.partner" id="gemeinde62139"&gt;&lt;field name="member_of_city_alliance"&gt;True&lt;/field&gt;&lt;/record&gt;</text:p>
          </table:table-cell>
          <table:table-cell/>
          <table:table-cell office:value-type="string" calcext:value-type="string">
            <text:p>Bruck an der Mur</text:p>
          </table:table-cell>
          <table:table-cell office:value-type="float" office:value="62139" calcext:value-type="float">
            <text:p>62139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4]" office:value-type="float" office:value="62145" calcext:value-type="float">
            <text:p>6214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4];[.B254];[.C254])" office:value-type="string" office:string-value="&lt;record model=&quot;res.partner&quot; id=&quot;gemeinde62145&quot;&gt;&lt;field name=&quot;member_of_city_alliance&quot;&gt;True&lt;/field&gt;&lt;/record&gt;" calcext:value-type="string">
            <text:p>&lt;record model="res.partner" id="gemeinde62145"&gt;&lt;field name="member_of_city_alliance"&gt;True&lt;/field&gt;&lt;/record&gt;</text:p>
          </table:table-cell>
          <table:table-cell/>
          <table:table-cell office:value-type="string" calcext:value-type="string">
            <text:p>Sankt Barbara im Mürztal</text:p>
          </table:table-cell>
          <table:table-cell office:value-type="float" office:value="62145" calcext:value-type="float">
            <text:p>6214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5]" office:value-type="float" office:value="62244" calcext:value-type="float">
            <text:p>62244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5];[.B255];[.C255])" office:value-type="string" office:string-value="&lt;record model=&quot;res.partner&quot; id=&quot;gemeinde62244&quot;&gt;&lt;field name=&quot;member_of_city_alliance&quot;&gt;True&lt;/field&gt;&lt;/record&gt;" calcext:value-type="string">
            <text:p>&lt;record model="res.partner" id="gemeinde62244"&gt;&lt;field name="member_of_city_alliance"&gt;True&lt;/field&gt;&lt;/record&gt;</text:p>
          </table:table-cell>
          <table:table-cell/>
          <table:table-cell office:value-type="string" calcext:value-type="string">
            <text:p>Sankt Johann in der Haide</text:p>
          </table:table-cell>
          <table:table-cell office:value-type="float" office:value="62244" calcext:value-type="float">
            <text:p>62244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6]" office:value-type="float" office:value="61113" calcext:value-type="float">
            <text:p>6111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6];[.B256];[.C256])" office:value-type="string" office:string-value="&lt;record model=&quot;res.partner&quot; id=&quot;gemeinde61113&quot;&gt;&lt;field name=&quot;member_of_city_alliance&quot;&gt;True&lt;/field&gt;&lt;/record&gt;" calcext:value-type="string">
            <text:p>&lt;record model="res.partner" id="gemeinde61113"&gt;&lt;field name="member_of_city_alliance"&gt;True&lt;/field&gt;&lt;/record&gt;</text:p>
          </table:table-cell>
          <table:table-cell/>
          <table:table-cell office:value-type="string" calcext:value-type="string">
            <text:p>Sankt Michael in Obersteiermark</text:p>
          </table:table-cell>
          <table:table-cell office:value-type="float" office:value="61113" calcext:value-type="float">
            <text:p>6111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7]" office:value-type="float" office:value="61425" calcext:value-type="float">
            <text:p>61425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7];[.B257];[.C257])" office:value-type="string" office:string-value="&lt;record model=&quot;res.partner&quot; id=&quot;gemeinde61425&quot;&gt;&lt;field name=&quot;member_of_city_alliance&quot;&gt;True&lt;/field&gt;&lt;/record&gt;" calcext:value-type="string">
            <text:p>&lt;record model="res.partner" id="gemeinde61425"&gt;&lt;field name="member_of_city_alliance"&gt;True&lt;/field&gt;&lt;/record&gt;</text:p>
          </table:table-cell>
          <table:table-cell/>
          <table:table-cell office:value-type="string" calcext:value-type="string">
            <text:p>St. Peter am Kammersberg</text:p>
          </table:table-cell>
          <table:table-cell office:value-type="float" office:value="61425" calcext:value-type="float">
            <text:p>61425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8]" office:value-type="float" office:value="31327" calcext:value-type="float">
            <text:p>31327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8];[.B258];[.C258])" office:value-type="string" office:string-value="&lt;record model=&quot;res.partner&quot; id=&quot;gemeinde31327&quot;&gt;&lt;field name=&quot;member_of_city_alliance&quot;&gt;True&lt;/field&gt;&lt;/record&gt;" calcext:value-type="string">
            <text:p>&lt;record model="res.partner" id="gemeinde31327"&gt;&lt;field name="member_of_city_alliance"&gt;True&lt;/field&gt;&lt;/record&gt;</text:p>
          </table:table-cell>
          <table:table-cell/>
          <table:table-cell office:value-type="string" calcext:value-type="string">
            <text:p>Mautern an der Donau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59]" office:value-type="float" office:value="31633" calcext:value-type="float">
            <text:p>31633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59];[.B259];[.C259])" office:value-type="string" office:string-value="&lt;record model=&quot;res.partner&quot; id=&quot;gemeinde31633&quot;&gt;&lt;field name=&quot;member_of_city_alliance&quot;&gt;True&lt;/field&gt;&lt;/record&gt;" calcext:value-type="string">
            <text:p>&lt;record model="res.partner" id="gemeinde31633"&gt;&lt;field name="member_of_city_alliance"&gt;True&lt;/field&gt;&lt;/record&gt;</text:p>
          </table:table-cell>
          <table:table-cell/>
          <table:table-cell office:value-type="string" calcext:value-type="string">
            <text:p>Mistelbach</text:p>
          </table:table-cell>
          <table:table-cell office:value-type="float" office:value="31633" calcext:value-type="float">
            <text:p>31633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60]" office:value-type="float" office:value="32530" calcext:value-type="float">
            <text:p>32530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60];[.B260];[.C260])" office:value-type="string" office:string-value="&lt;record model=&quot;res.partner&quot; id=&quot;gemeinde32530&quot;&gt;&lt;field name=&quot;member_of_city_alliance&quot;&gt;True&lt;/field&gt;&lt;/record&gt;" calcext:value-type="string">
            <text:p>&lt;record model="res.partner" id="gemeinde32530"&gt;&lt;field name="member_of_city_alliance"&gt;True&lt;/field&gt;&lt;/record&gt;</text:p>
          </table:table-cell>
          <table:table-cell/>
          <table:table-cell office:value-type="string" calcext:value-type="string">
            <text:p>Zwettl-Niederösterreich</text:p>
          </table:table-cell>
          <table:table-cell office:value-type="float" office:value="32530" calcext:value-type="float">
            <text:p>32530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61]" office:value-type="float" office:value="50418" calcext:value-type="float">
            <text:p>50418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61];[.B261];[.C261])" office:value-type="string" office:string-value="&lt;record model=&quot;res.partner&quot; id=&quot;gemeinde50418&quot;&gt;&lt;field name=&quot;member_of_city_alliance&quot;&gt;True&lt;/field&gt;&lt;/record&gt;" calcext:value-type="string">
            <text:p>&lt;record model="res.partner" id="gemeinde50418"&gt;&lt;field name="member_of_city_alliance"&gt;True&lt;/field&gt;&lt;/record&gt;</text:p>
          </table:table-cell>
          <table:table-cell/>
          <table:table-cell office:value-type="string" calcext:value-type="string">
            <text:p>Sankt Johann im Pongau</text:p>
          </table:table-cell>
          <table:table-cell office:value-type="float" office:value="50418" calcext:value-type="float">
            <text:p>50418</text:p>
          </table:table-cell>
        </table:table-row>
        <table:table-row table:style-name="ro1">
          <table:table-cell office:value-type="string" calcext:value-type="string">
            <text:p>&lt;record model="res.partner" id="gemeinde</text:p>
          </table:table-cell>
          <table:table-cell table:formula="of:=[.G262]" office:value-type="float" office:value="20501" calcext:value-type="float">
            <text:p>20501</text:p>
          </table:table-cell>
          <table:table-cell office:value-type="string" calcext:value-type="string">
            <text:p>"&gt;&lt;field name="member_of_city_alliance"&gt;True&lt;/field&gt;&lt;/record&gt;</text:p>
          </table:table-cell>
          <table:table-cell table:formula="of:=CONCATENATE([.A262];[.B262];[.C262])" office:value-type="string" office:string-value="&lt;record model=&quot;res.partner&quot; id=&quot;gemeinde20501&quot;&gt;&lt;field name=&quot;member_of_city_alliance&quot;&gt;True&lt;/field&gt;&lt;/record&gt;" calcext:value-type="string">
            <text:p>&lt;record model="res.partner" id="gemeinde20501"&gt;&lt;field name="member_of_city_alliance"&gt;True&lt;/field&gt;&lt;/record&gt;</text:p>
          </table:table-cell>
          <table:table-cell/>
          <table:table-cell office:value-type="string" calcext:value-type="string">
            <text:p>Althofen</text:p>
          </table:table-cell>
          <table:table-cell office:value-type="float" office:value="20501" calcext:value-type="float">
            <text:p>20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.00.0000</text:date>, <text:time style:data-style-name="N2" text:time-value="09:54:56.1793939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0:31:30.309986637</dc:date>
    <meta:editing-duration>PT29M43S</meta:editing-duration>
    <meta:editing-cycles>2</meta:editing-cycles>
    <meta:generator>LibreOffice/6.0.3.2$Linux_X86_64 LibreOffice_project/00m0$Build-2</meta:generator>
    <meta:document-statistic meta:table-count="1" meta:cell-count="1572" meta:object-count="0"/>
  </office:meta>
</office:document-meta>
</file>